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5000005D17201FE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9638*"/>
    </style:style>
    <style:style style:name="Таблица1.A1" style:family="table-cell">
      <style:table-cell-properties fo:padding="0.097cm" fo:border="0.5pt solid #000000"/>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5pt solid #000000"/>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97cm" fo:border="0.5pt solid #000000"/>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0.5pt solid #000000"/>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fo:padding="0.097cm" fo:border="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5pt solid #000000"/>
    </style:style>
    <style:style style:name="Таблица9" style:family="table">
      <style:table-properties style:width="17cm" table:align="margins"/>
    </style:style>
    <style:style style:name="Таблица9.A" style:family="table-column">
      <style:table-column-properties style:column-width="17cm" style:rel-column-width="65535*"/>
    </style:style>
    <style:style style:name="Таблица9.A1" style:family="table-cell">
      <style:table-cell-properties fo:padding="0.097cm" fo:border="0.5pt solid #000000"/>
    </style:style>
    <style:style style:name="P1" style:family="paragraph" style:parent-style-name="Title">
      <style:paragraph-properties fo:margin-top="0.101cm" fo:margin-bottom="0cm" style:contextual-spacing="false" fo:line-height="115%" fo:text-align="start" style:justify-single-word="false"/>
      <style:text-properties fo:font-size="24pt" style:font-size-asian="24pt" style:font-size-complex="24pt"/>
    </style:style>
    <style:style style:name="P2" style:family="paragraph" style:parent-style-name="Heading_20_2">
      <style:paragraph-properties fo:margin-top="0.101cm" fo:margin-bottom="0cm" style:contextual-spacing="false" fo:line-height="115%"/>
    </style:style>
    <style:style style:name="P3" style:family="paragraph" style:parent-style-name="Standard">
      <style:paragraph-properties fo:margin-top="0.101cm" fo:margin-bottom="0cm" style:contextual-spacing="false" fo:line-height="115%"/>
      <style:text-properties fo:font-size="14pt" officeooo:paragraph-rsid="0005b61a" style:font-size-asian="14pt" style:font-size-complex="14pt"/>
    </style:style>
    <style:style style:name="P4" style:family="paragraph" style:parent-style-name="Heading_20_2">
      <style:paragraph-properties fo:margin-top="0.101cm" fo:margin-bottom="0cm" style:contextual-spacing="false" fo:line-height="115%"/>
      <style:text-properties officeooo:paragraph-rsid="0005b61a"/>
    </style:style>
    <style:style style:name="P5" style:family="paragraph" style:parent-style-name="Text_20_body">
      <style:paragraph-properties fo:margin-top="0.101cm" fo:margin-bottom="0cm" style:contextual-spacing="false" fo:line-height="115%"/>
      <style:text-properties fo:font-size="14pt" style:font-size-asian="14pt" style:font-size-complex="14pt"/>
    </style:style>
    <style:style style:name="P6" style:family="paragraph" style:parent-style-name="Text_20_body">
      <style:paragraph-properties fo:margin-top="0.101cm" fo:margin-bottom="0cm" style:contextual-spacing="false" fo:line-height="115%"/>
      <style:text-properties fo:font-size="14pt" officeooo:paragraph-rsid="0005b61a" style:font-size-asian="14pt" style:font-size-complex="14pt"/>
    </style:style>
    <style:style style:name="P7" style:family="paragraph" style:parent-style-name="Text_20_body">
      <style:paragraph-properties fo:margin-top="0.101cm" fo:margin-bottom="0cm" style:contextual-spacing="false" fo:line-height="115%"/>
      <style:text-properties fo:font-size="14pt" officeooo:paragraph-rsid="00061047" style:font-size-asian="14pt" style:font-size-complex="14pt"/>
    </style:style>
    <style:style style:name="P8" style:family="paragraph" style:parent-style-name="Table_20_Contents">
      <style:paragraph-properties fo:margin-top="0.101cm" fo:margin-bottom="0cm" style:contextual-spacing="false" fo:line-height="115%"/>
      <style:text-properties fo:font-variant="normal" fo:text-transform="none" fo:color="#000000" loext:opacity="100%" style:font-name="Consolas" fo:font-size="14pt" fo:letter-spacing="normal" fo:font-style="normal" fo:font-weight="normal" officeooo:paragraph-rsid="00061047" style:font-name-asian="NSimSun" style:font-size-asian="14pt" style:font-name-complex="Liberation Mono" style:font-size-complex="14pt"/>
    </style:style>
    <style:style style:name="P9" style:family="paragraph" style:parent-style-name="Table_20_Contents">
      <style:paragraph-properties fo:margin-top="0.101cm" fo:margin-bottom="0cm" style:contextual-spacing="false" fo:line-height="115%"/>
      <style:text-properties fo:color="#000000" loext:opacity="100%" style:font-name="Liberation Mono" fo:font-size="14pt" officeooo:paragraph-rsid="00061047" style:font-name-asian="NSimSun" style:font-size-asian="14pt" style:font-name-complex="Liberation Mono" style:font-size-complex="14pt"/>
    </style:style>
    <style:style style:name="P10" style:family="paragraph" style:parent-style-name="Preformatted_20_Text">
      <style:paragraph-properties fo:margin-top="0.101cm" fo:margin-bottom="0cm" style:contextual-spacing="false" fo:line-height="115%"/>
    </style:style>
    <style:style style:name="P11" style:family="paragraph" style:parent-style-name="Text_20_body">
      <style:paragraph-properties fo:margin-top="0.101cm" fo:margin-bottom="0cm" style:contextual-spacing="false" fo:line-height="115%"/>
      <style:text-properties fo:font-size="14pt" officeooo:rsid="0007f2dd" officeooo:paragraph-rsid="0007f2dd" style:font-size-asian="14pt" style:font-size-complex="14pt"/>
    </style:style>
    <style:style style:name="P12" style:family="paragraph" style:parent-style-name="Text_20_body">
      <style:paragraph-properties fo:margin-top="0.101cm" fo:margin-bottom="0cm" style:contextual-spacing="false" fo:line-height="115%"/>
      <style:text-properties fo:font-size="14pt" fo:language="ru" fo:country="RU" officeooo:rsid="0007f2dd" officeooo:paragraph-rsid="0007f2dd" style:font-size-asian="14pt" style:font-size-complex="14pt"/>
    </style:style>
    <style:style style:name="P13" style:family="paragraph" style:parent-style-name="Text_20_body">
      <style:paragraph-properties fo:margin-top="0.101cm" fo:margin-bottom="0cm" style:contextual-spacing="false" fo:line-height="115%"/>
    </style:style>
    <style:style style:name="P14" style:family="paragraph" style:parent-style-name="Standard">
      <style:paragraph-properties fo:margin-top="0.101cm" fo:margin-bottom="0cm" style:contextual-spacing="false" fo:line-height="115%"/>
      <style:text-properties fo:font-size="14pt" officeooo:rsid="0007f2dd" officeooo:paragraph-rsid="0007f2dd" style:font-size-asian="14pt" style:font-size-complex="14pt"/>
    </style:style>
    <style:style style:name="P15" style:family="paragraph" style:parent-style-name="Table_20_Contents">
      <style:paragraph-properties fo:margin-left="0cm" fo:margin-right="0cm" fo:margin-top="0.101cm" fo:margin-bottom="0cm" style:contextual-spacing="false" fo:line-height="115%" fo:orphans="2" fo:widows="2" fo:text-indent="0cm" style:auto-text-indent="false"/>
      <style:text-properties officeooo:paragraph-rsid="00087d5f"/>
    </style:style>
    <style:style style:name="P16" style:family="paragraph" style:parent-style-name="Standard">
      <style:paragraph-properties fo:margin-top="0.101cm" fo:margin-bottom="0cm" style:contextual-spacing="false" fo:line-height="115%"/>
      <style:text-properties fo:font-size="14pt" officeooo:rsid="00087d5f" officeooo:paragraph-rsid="00087d5f" style:font-size-asian="14pt" style:font-size-complex="14pt"/>
    </style:style>
    <style:style style:name="P17" style:family="paragraph" style:parent-style-name="Standard">
      <style:paragraph-properties fo:margin-top="0.101cm" fo:margin-bottom="0cm" style:contextual-spacing="false" fo:line-height="115%"/>
      <style:text-properties officeooo:paragraph-rsid="0009ea46"/>
    </style:style>
    <style:style style:name="P18" style:family="paragraph" style:parent-style-name="Standard">
      <style:paragraph-properties fo:margin-top="0.101cm" fo:margin-bottom="0cm" style:contextual-spacing="false" fo:line-height="115%"/>
      <style:text-properties fo:font-size="14pt" fo:language="ru" fo:country="RU" officeooo:rsid="000a3ba4" officeooo:paragraph-rsid="0009ea46" style:font-size-asian="14pt" style:font-size-complex="14pt"/>
    </style:style>
    <style:style style:name="P19" style:family="paragraph" style:parent-style-name="Standard">
      <style:paragraph-properties fo:margin-top="0.101cm" fo:margin-bottom="0cm" style:contextual-spacing="false" fo:line-height="115%"/>
      <style:text-properties fo:font-size="14pt" fo:language="ru" fo:country="RU" officeooo:rsid="0008a7a1" officeooo:paragraph-rsid="0008a7a1" style:font-size-asian="14pt" style:font-size-complex="14pt"/>
    </style:style>
    <style:style style:name="P20" style:family="paragraph" style:parent-style-name="Standard" style:list-style-name="L1">
      <style:paragraph-properties fo:margin-top="0.101cm" fo:margin-bottom="0cm" style:contextual-spacing="false" fo:line-height="115%"/>
      <style:text-properties fo:font-size="14pt" fo:language="ru" fo:country="RU" officeooo:rsid="0008a7a1" officeooo:paragraph-rsid="0008a7a1" style:font-size-asian="14pt" style:font-size-complex="14pt"/>
    </style:style>
    <style:style style:name="P21" style:family="paragraph" style:parent-style-name="Standard" style:list-style-name="L1">
      <style:paragraph-properties fo:margin-top="0.101cm" fo:margin-bottom="0cm" style:contextual-spacing="false" fo:line-height="115%"/>
      <style:text-properties fo:font-size="14pt" officeooo:rsid="0008a7a1" officeooo:paragraph-rsid="0008a7a1" style:font-size-asian="14pt" style:font-size-complex="14pt"/>
    </style:style>
    <style:style style:name="P22" style:family="paragraph" style:parent-style-name="Standard">
      <style:paragraph-properties fo:margin-top="0.101cm" fo:margin-bottom="0cm" style:contextual-spacing="false" fo:line-height="115%"/>
      <style:text-properties fo:font-size="14pt" officeooo:rsid="0008a7a1" officeooo:paragraph-rsid="0008a7a1" style:font-size-asian="14pt" style:font-size-complex="14pt"/>
    </style:style>
    <style:style style:name="P23" style:family="paragraph" style:parent-style-name="Standard">
      <style:paragraph-properties fo:margin-top="0.101cm" fo:margin-bottom="0cm" style:contextual-spacing="false" fo:line-height="115%"/>
      <style:text-properties fo:font-size="14pt" fo:language="ru" fo:country="RU" officeooo:rsid="0009ea46" officeooo:paragraph-rsid="0009ea46" style:font-size-asian="14pt" style:font-size-complex="14pt"/>
    </style:style>
    <style:style style:name="P24" style:family="paragraph" style:parent-style-name="Text_20_body">
      <style:paragraph-properties fo:margin-top="0.101cm" fo:margin-bottom="0cm" style:contextual-spacing="false" fo:line-height="115%"/>
      <style:text-properties fo:font-size="14pt" officeooo:paragraph-rsid="000bfb9a" style:font-size-asian="14pt" style:font-size-complex="14pt"/>
    </style:style>
    <style:style style:name="P25" style:family="paragraph" style:parent-style-name="Heading_20_3">
      <style:paragraph-properties fo:margin-top="0.101cm" fo:margin-bottom="0cm" style:contextual-spacing="false" fo:line-height="115%"/>
    </style:style>
    <style:style style:name="P26" style:family="paragraph" style:parent-style-name="Text_20_body">
      <style:paragraph-properties fo:margin-top="0.101cm" fo:margin-bottom="0cm" style:contextual-spacing="false" fo:line-height="115%"/>
      <style:text-properties fo:font-size="14pt" fo:language="en" fo:country="US" style:font-size-asian="14pt" style:font-size-complex="14pt"/>
    </style:style>
    <style:style style:name="P27" style:family="paragraph" style:parent-style-name="Text_20_body">
      <style:paragraph-properties fo:margin-top="0.101cm" fo:margin-bottom="0cm" style:contextual-spacing="false" fo:line-height="115%"/>
      <style:text-properties fo:font-size="14pt" officeooo:rsid="0011e69b" officeooo:paragraph-rsid="0011e69b" style:font-size-asian="14pt" style:font-size-complex="14pt"/>
    </style:style>
    <style:style style:name="P28" style:family="paragraph" style:parent-style-name="Table_20_Contents">
      <style:paragraph-properties fo:margin-top="0.101cm" fo:margin-bottom="0cm" style:contextual-spacing="false" fo:line-height="115%"/>
    </style:style>
    <style:style style:name="P29" style:family="paragraph" style:parent-style-name="Text_20_body">
      <style:paragraph-properties fo:margin-top="0.101cm" fo:margin-bottom="0cm" style:contextual-spacing="false" fo:line-height="115%"/>
      <style:text-properties fo:language="en" fo:country="US" officeooo:rsid="000a3ba4" officeooo:paragraph-rsid="000a3ba4"/>
    </style:style>
    <style:style style:name="P30" style:family="paragraph" style:parent-style-name="Text_20_body">
      <style:paragraph-properties fo:margin-top="0.101cm" fo:margin-bottom="0cm" style:contextual-spacing="false" fo:line-height="115%"/>
      <style:text-properties officeooo:paragraph-rsid="000ff7b5"/>
    </style:style>
    <style:style style:name="P31" style:family="paragraph" style:parent-style-name="Heading_20_3">
      <style:paragraph-properties fo:margin-top="0.101cm" fo:margin-bottom="0cm" style:contextual-spacing="false" fo:line-height="115%"/>
      <style:text-properties officeooo:paragraph-rsid="000bfb9a"/>
    </style:style>
    <style:style style:name="P32" style:family="paragraph" style:parent-style-name="Text_20_body">
      <style:paragraph-properties fo:margin-top="0.101cm" fo:margin-bottom="0cm" style:contextual-spacing="false" fo:line-height="115%"/>
      <style:text-properties fo:font-size="14pt" fo:language="en" fo:country="US" officeooo:paragraph-rsid="000bfb9a" style:font-size-asian="14pt" style:font-size-complex="14pt"/>
    </style:style>
    <style:style style:name="P33" style:family="paragraph" style:parent-style-name="Table_20_Contents">
      <style:paragraph-properties fo:margin-top="0.101cm" fo:margin-bottom="0cm" style:contextual-spacing="false" fo:line-height="115%"/>
      <style:text-properties officeooo:paragraph-rsid="000bfb9a"/>
    </style:style>
    <style:style style:name="P34" style:family="paragraph" style:parent-style-name="Text_20_body">
      <style:paragraph-properties fo:margin-top="0.101cm" fo:margin-bottom="0cm" style:contextual-spacing="false" fo:line-height="115%"/>
      <style:text-properties fo:language="en" fo:country="US" officeooo:rsid="000a3ba4" officeooo:paragraph-rsid="000bfb9a"/>
    </style:style>
    <style:style style:name="P35" style:family="paragraph" style:parent-style-name="Text_20_body">
      <style:paragraph-properties fo:margin-top="0.101cm" fo:margin-bottom="0cm" style:contextual-spacing="false" fo:line-height="115%"/>
      <style:text-properties officeooo:paragraph-rsid="000f8933"/>
    </style:style>
    <style:style style:name="P36" style:family="paragraph" style:parent-style-name="Text_20_body">
      <style:paragraph-properties fo:margin-top="0.101cm" fo:margin-bottom="0cm" style:contextual-spacing="false" fo:line-height="115%"/>
      <style:text-properties officeooo:paragraph-rsid="000f2149"/>
    </style:style>
    <style:style style:name="P37" style:family="paragraph" style:parent-style-name="Text_20_body">
      <style:paragraph-properties fo:margin-top="0.101cm" fo:margin-bottom="0cm" style:contextual-spacing="false" fo:line-height="115%"/>
      <style:text-properties fo:font-size="14pt" officeooo:paragraph-rsid="0011e69b" style:font-size-asian="14pt" style:font-size-complex="14pt"/>
    </style:style>
    <style:style style:name="P38" style:family="paragraph" style:parent-style-name="Text_20_body">
      <style:paragraph-properties fo:margin-top="0.101cm" fo:margin-bottom="0cm" style:contextual-spacing="false" fo:line-height="115%"/>
      <style:text-properties officeooo:paragraph-rsid="0013d08d"/>
    </style:style>
    <style:style style:name="P39" style:family="paragraph" style:parent-style-name="Text_20_body">
      <style:paragraph-properties fo:margin-top="0.101cm" fo:margin-bottom="0cm" style:contextual-spacing="false" fo:line-height="115%"/>
      <style:text-properties fo:font-size="14pt" officeooo:rsid="000a3ba4" officeooo:paragraph-rsid="0013d08d" style:font-size-asian="14pt" style:font-size-complex="14pt"/>
    </style:style>
    <style:style style:name="P40" style:family="paragraph" style:parent-style-name="Standard">
      <style:paragraph-properties fo:margin-top="0.101cm" fo:margin-bottom="0cm" style:contextual-spacing="false" fo:line-height="115%"/>
      <style:text-properties fo:font-size="14pt" fo:language="ru" fo:country="RU" officeooo:rsid="000a3ba4" officeooo:paragraph-rsid="000a3ba4" style:font-size-asian="14pt" style:font-size-complex="14pt"/>
    </style:style>
    <style:style style:name="P41" style:family="paragraph" style:parent-style-name="Heading_20_2">
      <style:paragraph-properties fo:margin-top="0.101cm" fo:margin-bottom="0cm" style:contextual-spacing="false" fo:line-height="115%"/>
      <style:text-properties officeooo:paragraph-rsid="001523c7"/>
    </style:style>
    <style:style style:name="P42" style:family="paragraph" style:parent-style-name="Text_20_body">
      <style:paragraph-properties fo:margin-top="0.101cm" fo:margin-bottom="0cm" style:contextual-spacing="false" fo:line-height="115%"/>
      <style:text-properties fo:font-size="14pt" fo:language="en" fo:country="US" officeooo:paragraph-rsid="001608de" style:font-size-asian="14pt" style:font-size-complex="14pt"/>
    </style:style>
    <style:style style:name="P43" style:family="paragraph" style:parent-style-name="Text_20_body">
      <style:paragraph-properties fo:margin-top="0.101cm" fo:margin-bottom="0cm" style:contextual-spacing="false" fo:line-height="115%"/>
      <style:text-properties fo:font-size="14pt" officeooo:paragraph-rsid="001523c7" style:font-size-asian="14pt" style:font-size-complex="14pt"/>
    </style:style>
    <style:style style:name="P44" style:family="paragraph" style:parent-style-name="Heading_20_3">
      <style:paragraph-properties fo:margin-top="0.101cm" fo:margin-bottom="0cm" style:contextual-spacing="false" fo:line-height="115%"/>
      <style:text-properties officeooo:paragraph-rsid="001608de"/>
    </style:style>
    <style:style style:name="P45" style:family="paragraph" style:parent-style-name="Text_20_body">
      <style:paragraph-properties fo:margin-top="0.101cm" fo:margin-bottom="0cm" style:contextual-spacing="false" fo:line-height="115%"/>
      <style:text-properties fo:font-size="14pt" officeooo:paragraph-rsid="001608de" style:font-size-asian="14pt" style:font-size-complex="14pt"/>
    </style:style>
    <style:style style:name="P46" style:family="paragraph" style:parent-style-name="Table_20_Contents">
      <style:paragraph-properties fo:margin-top="0.101cm" fo:margin-bottom="0cm" style:contextual-spacing="false" fo:line-height="115%"/>
      <style:text-properties officeooo:paragraph-rsid="001608de"/>
    </style:style>
    <style:style style:name="P47" style:family="paragraph" style:parent-style-name="Text_20_body">
      <style:paragraph-properties fo:margin-top="0.101cm" fo:margin-bottom="0cm" style:contextual-spacing="false" fo:line-height="115%"/>
      <style:text-properties fo:language="en" fo:country="US" officeooo:rsid="000a3ba4" officeooo:paragraph-rsid="001608de"/>
    </style:style>
    <style:style style:name="P48" style:family="paragraph" style:parent-style-name="Text_20_body">
      <style:paragraph-properties fo:margin-top="0.101cm" fo:margin-bottom="0cm" style:contextual-spacing="false" fo:line-height="115%"/>
      <style:text-properties officeooo:paragraph-rsid="0017db72"/>
    </style:style>
    <style:style style:name="P49" style:family="paragraph" style:parent-style-name="Text_20_body">
      <style:paragraph-properties fo:margin-top="0.101cm" fo:margin-bottom="0cm" style:contextual-spacing="false" fo:line-height="115%"/>
      <style:text-properties officeooo:paragraph-rsid="0019b565"/>
    </style:style>
    <style:style style:name="P50" style:family="paragraph" style:parent-style-name="Heading_20_3">
      <style:paragraph-properties fo:margin-top="0.101cm" fo:margin-bottom="0cm" style:contextual-spacing="false" fo:line-height="115%"/>
      <style:text-properties officeooo:paragraph-rsid="0019b565"/>
    </style:style>
    <style:style style:name="P51" style:family="paragraph" style:parent-style-name="Text_20_body">
      <style:paragraph-properties fo:margin-top="0.101cm" fo:margin-bottom="0cm" style:contextual-spacing="false" fo:line-height="115%"/>
      <style:text-properties officeooo:paragraph-rsid="001bb370"/>
    </style:style>
    <style:style style:name="P52" style:family="paragraph" style:parent-style-name="Text_20_body">
      <style:paragraph-properties fo:margin-top="0.101cm" fo:margin-bottom="0cm" style:contextual-spacing="false" fo:line-height="115%"/>
      <style:text-properties fo:font-size="14pt" officeooo:rsid="0011e69b" officeooo:paragraph-rsid="0019b565" style:font-size-asian="14pt" style:font-size-complex="14pt"/>
    </style:style>
    <style:style style:name="P53" style:family="paragraph" style:parent-style-name="Table_20_Contents">
      <style:paragraph-properties fo:margin-top="0.101cm" fo:margin-bottom="0cm" style:contextual-spacing="false" fo:line-height="115%"/>
      <style:text-properties officeooo:paragraph-rsid="0019b565"/>
    </style:style>
    <style:style style:name="P54" style:family="paragraph" style:parent-style-name="Text_20_body">
      <style:paragraph-properties fo:margin-top="0.101cm" fo:margin-bottom="0cm" style:contextual-spacing="false" fo:line-height="115%"/>
      <style:text-properties fo:language="en" fo:country="US" officeooo:rsid="000a3ba4" officeooo:paragraph-rsid="0019b565"/>
    </style:style>
    <style:style style:name="P55" style:family="paragraph" style:parent-style-name="Heading_20_3">
      <style:paragraph-properties fo:margin-top="0.101cm" fo:margin-bottom="0cm" style:contextual-spacing="false" fo:line-height="115%"/>
      <style:text-properties officeooo:paragraph-rsid="001bb370"/>
    </style:style>
    <style:style style:name="P56" style:family="paragraph" style:parent-style-name="Text_20_body">
      <style:paragraph-properties fo:margin-top="0.101cm" fo:margin-bottom="0cm" style:contextual-spacing="false" fo:line-height="115%"/>
      <style:text-properties fo:font-size="14pt" officeooo:rsid="0011e69b" officeooo:paragraph-rsid="001bb370" style:font-size-asian="14pt" style:font-size-complex="14pt"/>
    </style:style>
    <style:style style:name="P57" style:family="paragraph" style:parent-style-name="Table_20_Contents">
      <style:paragraph-properties fo:margin-top="0.101cm" fo:margin-bottom="0cm" style:contextual-spacing="false" fo:line-height="115%"/>
      <style:text-properties officeooo:paragraph-rsid="001bb370"/>
    </style:style>
    <style:style style:name="P58" style:family="paragraph" style:parent-style-name="Text_20_body">
      <style:paragraph-properties fo:margin-top="0.101cm" fo:margin-bottom="0cm" style:contextual-spacing="false" fo:line-height="115%"/>
      <style:text-properties fo:language="en" fo:country="US" officeooo:rsid="000a3ba4" officeooo:paragraph-rsid="001bb370"/>
    </style:style>
    <style:style style:name="P59" style:family="paragraph" style:parent-style-name="Text_20_body">
      <style:paragraph-properties fo:margin-top="0.101cm" fo:margin-bottom="0cm" style:contextual-spacing="false" fo:line-height="115%"/>
      <style:text-properties officeooo:paragraph-rsid="001c7d9e"/>
    </style:style>
    <style:style style:name="P60" style:family="paragraph" style:parent-style-name="Heading_20_3">
      <style:paragraph-properties fo:margin-top="0.101cm" fo:margin-bottom="0cm" style:contextual-spacing="false" fo:line-height="115%"/>
      <style:text-properties officeooo:paragraph-rsid="001c7d9e"/>
    </style:style>
    <style:style style:name="P61" style:family="paragraph" style:parent-style-name="Text_20_body">
      <style:paragraph-properties fo:margin-top="0.101cm" fo:margin-bottom="0cm" style:contextual-spacing="false" fo:line-height="115%"/>
      <style:text-properties fo:font-size="14pt" fo:language="ru" fo:country="RU" officeooo:rsid="001c7d9e" officeooo:paragraph-rsid="001c7d9e" style:font-size-asian="14pt" style:font-size-complex="14pt"/>
    </style:style>
    <style:style style:name="P62" style:family="paragraph" style:parent-style-name="Table_20_Contents">
      <style:paragraph-properties fo:margin-top="0.101cm" fo:margin-bottom="0cm" style:contextual-spacing="false" fo:line-height="115%"/>
      <style:text-properties officeooo:paragraph-rsid="001c7d9e"/>
    </style:style>
    <style:style style:name="P63" style:family="paragraph" style:parent-style-name="Text_20_body">
      <style:paragraph-properties fo:margin-top="0.101cm" fo:margin-bottom="0cm" style:contextual-spacing="false" fo:line-height="115%"/>
      <style:text-properties fo:language="en" fo:country="US" officeooo:rsid="000a3ba4" officeooo:paragraph-rsid="001c7d9e"/>
    </style:style>
    <style:style style:name="P64" style:family="paragraph" style:parent-style-name="Text_20_body">
      <style:paragraph-properties fo:margin-top="0.101cm" fo:margin-bottom="0cm" style:contextual-spacing="false" fo:line-height="115%"/>
      <style:text-properties officeooo:paragraph-rsid="001f1b89"/>
    </style:style>
    <style:style style:name="P65" style:family="paragraph" style:parent-style-name="Text_20_body">
      <style:paragraph-properties fo:margin-top="0.101cm" fo:margin-bottom="0cm" style:contextual-spacing="false" fo:line-height="115%"/>
      <style:text-properties officeooo:paragraph-rsid="001db424"/>
    </style:style>
    <style:style style:name="P66" style:family="paragraph" style:parent-style-name="Text_20_body">
      <style:paragraph-properties fo:margin-top="0.101cm" fo:margin-bottom="0cm" style:contextual-spacing="false" fo:line-height="115%"/>
      <style:text-properties officeooo:paragraph-rsid="00207bee"/>
    </style:style>
    <style:style style:name="T1" style:family="text">
      <style:text-properties officeooo:rsid="0005b61a"/>
    </style:style>
    <style:style style:name="T2" style:family="text">
      <style:text-properties officeooo:rsid="00061047"/>
    </style:style>
    <style:style style:name="T3" style:family="text">
      <style:text-properties fo:font-variant="normal" fo:text-transform="none" style:font-name="Consolas" fo:letter-spacing="normal" fo:font-style="normal" fo:font-weight="normal"/>
    </style:style>
    <style:style style:name="T4" style:family="text">
      <style:text-properties fo:font-size="14pt" style:font-size-asian="14pt" style:font-size-complex="14pt"/>
    </style:style>
    <style:style style:name="T5" style:family="text">
      <style:text-properties fo:language="en" fo:country="US"/>
    </style:style>
    <style:style style:name="T6" style:family="text">
      <style:text-properties fo:language="ru" fo:country="RU"/>
    </style:style>
    <style:style style:name="T7" style:family="text">
      <style:text-properties fo:font-size="14pt" fo:language="ru" fo:country="RU" officeooo:rsid="0009ea46" style:font-size-asian="14pt" style:font-size-complex="14pt"/>
    </style:style>
    <style:style style:name="T8" style:family="text">
      <style:text-properties fo:font-size="14pt" fo:language="en" fo:country="US" officeooo:rsid="0009ea46" style:font-size-asian="14pt" style:font-size-complex="14pt"/>
    </style:style>
    <style:style style:name="T9" style:family="text">
      <style:text-properties fo:font-size="14pt" fo:language="ru" fo:country="RU" officeooo:rsid="000a3ba4" style:font-size-asian="14pt" style:font-size-complex="14pt"/>
    </style:style>
    <style:style style:name="T10" style:family="text">
      <style:text-properties officeooo:rsid="000a3ba4"/>
    </style:style>
    <style:style style:name="T11" style:family="text">
      <style:text-properties officeooo:rsid="000d67e8"/>
    </style:style>
    <style:style style:name="T12" style:family="text">
      <style:text-properties fo:language="ru" fo:country="RU" officeooo:rsid="000a3ba4"/>
    </style:style>
    <style:style style:name="T13" style:family="text">
      <style:text-properties fo:language="en" fo:country="US" officeooo:rsid="000bfb9a"/>
    </style:style>
    <style:style style:name="T14" style:family="text">
      <style:text-properties fo:language="ru" fo:country="RU" officeooo:rsid="000bfb9a"/>
    </style:style>
    <style:style style:name="T15" style:family="text">
      <style:text-properties officeooo:rsid="000bfb9a"/>
    </style:style>
    <style:style style:name="T16" style:family="text">
      <style:text-properties style:font-name="Liberation Serif" fo:font-size="14pt" fo:language="ru" fo:country="RU" officeooo:rsid="000d67e8" style:font-size-asian="14pt" style:font-size-complex="14pt"/>
    </style:style>
    <style:style style:name="T17" style:family="text">
      <style:text-properties style:font-name="Liberation Serif" fo:font-size="14pt" fo:language="ru" fo:country="RU" officeooo:rsid="000ff7b5" style:font-size-asian="14pt" style:font-size-complex="14pt"/>
    </style:style>
    <style:style style:name="T18" style:family="text">
      <style:text-properties fo:font-size="14pt" fo:language="ru" fo:country="RU" officeooo:rsid="000ff7b5" style:font-size-asian="14pt" style:font-size-complex="14pt"/>
    </style:style>
    <style:style style:name="T19" style:family="text">
      <style:text-properties style:font-name="Liberation Serif" fo:font-size="14pt" fo:language="en" fo:country="US" officeooo:rsid="000ff7b5" style:font-size-asian="14pt" style:font-size-complex="14pt"/>
    </style:style>
    <style:style style:name="T20" style:family="text">
      <style:text-properties style:font-name="Liberation Serif" fo:font-size="14pt" fo:language="en" fo:country="US" officeooo:rsid="000d67e8" style:font-size-asian="14pt" style:font-size-complex="14pt"/>
    </style:style>
    <style:style style:name="T21" style:family="text">
      <style:text-properties fo:font-size="14pt" fo:language="en" fo:country="US" officeooo:rsid="000ff7b5" style:font-size-asian="14pt" style:font-size-complex="14pt"/>
    </style:style>
    <style:style style:name="T22" style:family="text">
      <style:text-properties style:font-name="Liberation Serif" fo:font-size="14pt" style:font-size-asian="14pt" style:font-size-complex="14pt"/>
    </style:style>
    <style:style style:name="T23" style:family="text">
      <style:text-properties style:font-name="Liberation Serif" fo:font-size="14pt" officeooo:rsid="000bfb9a" style:font-size-asian="14pt" style:font-size-complex="14pt"/>
    </style:style>
    <style:style style:name="T24" style:family="text">
      <style:text-properties style:font-name="Liberation Serif" fo:font-size="14pt" fo:language="ru" fo:country="RU" officeooo:rsid="000bfb9a" style:font-size-asian="14pt" style:font-size-complex="14pt"/>
    </style:style>
    <style:style style:name="T25" style:family="text">
      <style:text-properties style:font-name="Liberation Serif" fo:font-size="14pt" fo:language="ru" fo:country="RU" officeooo:rsid="000f2149" style:font-size-asian="14pt" style:font-size-complex="14pt"/>
    </style:style>
    <style:style style:name="T26" style:family="text">
      <style:text-properties fo:font-size="14pt" fo:language="ru" fo:country="RU" officeooo:rsid="000f2149" style:font-size-asian="14pt" style:font-size-complex="14pt"/>
    </style:style>
    <style:style style:name="T27" style:family="text">
      <style:text-properties style:font-name="Liberation Serif" fo:font-size="14pt" fo:language="en" fo:country="US" officeooo:rsid="000f2149" style:font-size-asian="14pt" style:font-size-complex="14pt"/>
    </style:style>
    <style:style style:name="T28" style:family="text">
      <style:text-properties fo:font-size="14pt" fo:language="en" fo:country="US" officeooo:rsid="000bfb9a" style:font-size-asian="14pt" style:font-size-complex="14pt"/>
    </style:style>
    <style:style style:name="T29" style:family="text">
      <style:text-properties fo:font-size="14pt" fo:language="ru" fo:country="RU" officeooo:rsid="000f8933" style:font-size-asian="14pt" style:font-size-complex="14pt"/>
    </style:style>
    <style:style style:name="T30" style:family="text">
      <style:text-properties fo:font-size="14pt" officeooo:rsid="000f2149" style:font-size-asian="14pt" style:font-size-complex="14pt"/>
    </style:style>
    <style:style style:name="T31" style:family="text">
      <style:text-properties fo:font-size="14pt" officeooo:rsid="000f8933" style:font-size-asian="14pt" style:font-size-complex="14pt"/>
    </style:style>
    <style:style style:name="T32" style:family="text">
      <style:text-properties style:font-name="Liberation Serif" fo:font-size="14pt" fo:language="ru" fo:country="RU" officeooo:rsid="000f8933" style:font-size-asian="14pt" style:font-size-complex="14pt"/>
    </style:style>
    <style:style style:name="T33" style:family="text">
      <style:text-properties fo:font-size="14pt" fo:language="en" fo:country="US" officeooo:rsid="000f8933" style:font-size-asian="14pt" style:font-size-complex="14pt"/>
    </style:style>
    <style:style style:name="T34" style:family="text">
      <style:text-properties fo:font-size="14pt" fo:language="ru" fo:country="RU" style:font-size-asian="14pt" style:font-size-complex="14pt"/>
    </style:style>
    <style:style style:name="T35" style:family="text">
      <style:text-properties fo:language="ru" fo:country="RU" officeooo:rsid="0011e69b"/>
    </style:style>
    <style:style style:name="T36" style:family="text">
      <style:text-properties fo:font-size="14pt" fo:language="ru" fo:country="RU" officeooo:rsid="0011e69b" style:font-size-asian="14pt" style:font-size-complex="14pt"/>
    </style:style>
    <style:style style:name="T37" style:family="text">
      <style:text-properties fo:font-size="14pt" fo:language="en" fo:country="US" officeooo:rsid="0011e69b" style:font-size-asian="14pt" style:font-size-complex="14pt"/>
    </style:style>
    <style:style style:name="T38" style:family="text">
      <style:text-properties fo:font-size="14pt" fo:language="ru" fo:country="RU" officeooo:rsid="0013d08d" style:font-size-asian="14pt" style:font-size-complex="14pt"/>
    </style:style>
    <style:style style:name="T39" style:family="text">
      <style:text-properties fo:font-size="14pt" fo:language="en" fo:country="US" officeooo:rsid="0013d08d" style:font-size-asian="14pt" style:font-size-complex="14pt"/>
    </style:style>
    <style:style style:name="T40" style:family="text">
      <style:text-properties officeooo:rsid="0013d08d"/>
    </style:style>
    <style:style style:name="T41" style:family="text">
      <style:text-properties fo:language="en" fo:country="US" officeooo:rsid="0013d08d"/>
    </style:style>
    <style:style style:name="T42" style:family="text">
      <style:text-properties fo:language="ru" fo:country="RU" officeooo:rsid="0013d08d"/>
    </style:style>
    <style:style style:name="T43" style:family="text">
      <style:text-properties fo:language="en" fo:country="US" officeooo:rsid="000f8933"/>
    </style:style>
    <style:style style:name="T44" style:family="text">
      <style:text-properties officeooo:rsid="001523c7"/>
    </style:style>
    <style:style style:name="T45" style:family="text">
      <style:text-properties fo:language="ru" fo:country="RU" officeooo:rsid="001608de"/>
    </style:style>
    <style:style style:name="T46" style:family="text">
      <style:text-properties officeooo:rsid="001608de"/>
    </style:style>
    <style:style style:name="T47" style:family="text">
      <style:text-properties officeooo:rsid="0011e69b"/>
    </style:style>
    <style:style style:name="T48" style:family="text">
      <style:text-properties style:font-name="Liberation Serif" fo:font-size="14pt" fo:language="ru" fo:country="RU" officeooo:rsid="0017db72" style:font-size-asian="14pt" style:font-size-complex="14pt"/>
    </style:style>
    <style:style style:name="T49" style:family="text">
      <style:text-properties fo:font-size="14pt" fo:language="ru" fo:country="RU" officeooo:rsid="0017db72" style:font-size-asian="14pt" style:font-size-complex="14pt"/>
    </style:style>
    <style:style style:name="T50" style:family="text">
      <style:text-properties style:font-name="Liberation Serif" fo:font-size="14pt" fo:language="en" fo:country="US" officeooo:rsid="0017db72" style:font-size-asian="14pt" style:font-size-complex="14pt"/>
    </style:style>
    <style:style style:name="T51" style:family="text">
      <style:text-properties style:font-name="Liberation Serif" fo:font-size="14pt" fo:language="ru" fo:country="RU" officeooo:rsid="000a3ba4" style:font-size-asian="14pt" style:font-size-complex="14pt"/>
    </style:style>
    <style:style style:name="T52" style:family="text">
      <style:text-properties style:font-name="Liberation Serif" fo:font-size="14pt" fo:language="en" fo:country="US" officeooo:rsid="000f8933" style:font-size-asian="14pt" style:font-size-complex="14pt"/>
    </style:style>
    <style:style style:name="T53" style:family="text">
      <style:text-properties style:font-name="Liberation Serif" fo:font-size="14pt" fo:language="ru" fo:country="RU" officeooo:rsid="0019b565" style:font-size-asian="14pt" style:font-size-complex="14pt"/>
    </style:style>
    <style:style style:name="T54" style:family="text">
      <style:text-properties style:font-name="Liberation Serif" fo:font-size="14pt" fo:language="en" fo:country="US" officeooo:rsid="0019b565" style:font-size-asian="14pt" style:font-size-complex="14pt"/>
    </style:style>
    <style:style style:name="T55" style:family="text">
      <style:text-properties fo:language="en" fo:country="US" officeooo:rsid="0019b565"/>
    </style:style>
    <style:style style:name="T56" style:family="text">
      <style:text-properties fo:font-size="14pt" fo:language="ru" fo:country="RU" officeooo:rsid="0019b565" style:font-size-asian="14pt" style:font-size-complex="14pt"/>
    </style:style>
    <style:style style:name="T57" style:family="text">
      <style:text-properties fo:font-size="14pt" fo:language="en" fo:country="US" officeooo:rsid="0019b565" style:font-size-asian="14pt" style:font-size-complex="14pt"/>
    </style:style>
    <style:style style:name="T58" style:family="text">
      <style:text-properties fo:font-size="14pt" fo:language="ru" fo:country="RU" officeooo:rsid="001bb370" style:font-size-asian="14pt" style:font-size-complex="14pt"/>
    </style:style>
    <style:style style:name="T59" style:family="text">
      <style:text-properties style:font-name="Liberation Serif" fo:font-size="14pt" fo:language="ru" fo:country="RU" officeooo:rsid="001c7d9e" style:font-size-asian="14pt" style:font-size-complex="14pt"/>
    </style:style>
    <style:style style:name="T60" style:family="text">
      <style:text-properties fo:language="ru" fo:country="RU" officeooo:rsid="001bb370"/>
    </style:style>
    <style:style style:name="T61" style:family="text">
      <style:text-properties fo:language="en" fo:country="US" officeooo:rsid="001bb370"/>
    </style:style>
    <style:style style:name="T62" style:family="text">
      <style:text-properties fo:font-size="14pt" fo:language="en" fo:country="US" officeooo:rsid="001bb370" style:font-size-asian="14pt" style:font-size-complex="14pt"/>
    </style:style>
    <style:style style:name="T63" style:family="text">
      <style:text-properties style:font-name="Liberation Serif" fo:font-size="14pt" fo:language="ru" fo:country="RU" officeooo:rsid="001bb370" style:font-size-asian="14pt" style:font-size-complex="14pt"/>
    </style:style>
    <style:style style:name="T64" style:family="text">
      <style:text-properties style:font-name="Liberation Serif" fo:font-size="14pt" fo:language="en" fo:country="US" officeooo:rsid="001bb370" style:font-size-asian="14pt" style:font-size-complex="14pt"/>
    </style:style>
    <style:style style:name="T65" style:family="text">
      <style:text-properties fo:font-size="14pt" fo:language="ru" fo:country="RU" officeooo:rsid="001c7d9e" style:font-size-asian="14pt" style:font-size-complex="14pt"/>
    </style:style>
    <style:style style:name="T66" style:family="text">
      <style:text-properties style:font-name="Liberation Serif" fo:font-size="14pt" fo:language="en" fo:country="US" officeooo:rsid="001c7d9e" style:font-size-asian="14pt" style:font-size-complex="14pt"/>
    </style:style>
    <style:style style:name="T67" style:family="text">
      <style:text-properties fo:language="ru" fo:country="RU" officeooo:rsid="001c7d9e"/>
    </style:style>
    <style:style style:name="T68" style:family="text">
      <style:text-properties fo:font-size="14pt" officeooo:rsid="0011e69b" style:font-size-asian="14pt" style:font-size-complex="14pt"/>
    </style:style>
    <style:style style:name="T69" style:family="text">
      <style:text-properties style:font-name="Liberation Serif" fo:font-size="14pt" fo:language="ru" fo:country="RU" officeooo:rsid="001db424" style:font-size-asian="14pt" style:font-size-complex="14pt"/>
    </style:style>
    <style:style style:name="T70" style:family="text">
      <style:text-properties style:font-name="Liberation Serif" fo:font-size="14pt" fo:language="en" fo:country="US" officeooo:rsid="001db424" style:font-size-asian="14pt" style:font-size-complex="14pt"/>
    </style:style>
    <style:style style:name="T71" style:family="text">
      <style:text-properties fo:font-size="14pt" fo:language="ru" fo:country="RU" officeooo:rsid="001db424" style:font-size-asian="14pt" style:font-size-complex="14pt"/>
    </style:style>
    <style:style style:name="T72" style:family="text">
      <style:text-properties style:font-name="Liberation Serif" fo:font-size="14pt" fo:language="ru" fo:country="RU" officeooo:rsid="001f1b89" style:font-size-asian="14pt" style:font-size-complex="14pt"/>
    </style:style>
    <style:style style:name="T73" style:family="text">
      <style:text-properties style:font-name="Liberation Serif" fo:font-size="14pt" fo:language="ru" fo:country="RU" officeooo:rsid="00207bee" style:font-size-asian="14pt" style:font-size-complex="14pt"/>
    </style:style>
    <style:style style:name="T74" style:family="text">
      <style:text-properties style:font-name="Liberation Serif" fo:font-size="14pt" fo:language="en" fo:country="US" officeooo:rsid="00207be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Курсовая работа по дисциплине «Классическое машинное обучение»</text:p>
      <text:h text:style-name="P2" text:outline-level="2"/>
      <text:h text:style-name="P2" text:outline-level="2">Цель работы: </text:h>
      <text:p text:style-name="P3"><text:span text:style-name="T1">П</text:span>остроить прогноз, позволяющий подобрать наиболее эффективное сочетание параметров для создания лекарственных препаратов. </text:p>
      <text:p text:style-name="P3"/>
      <text:h text:style-name="P4" text:outline-level="2">Описание работы:</text:h>
      <text:p text:style-name="P5"><text:span text:style-name="T1">Нам дан датасет из 213 признаков, три из которых являются целевыми.</text:span> </text:p>
      <text:p text:style-name="P5">Необходимо <text:span text:style-name="T1">провести исследовательский анализ предоставленных данных, выявить наиболее значимые для построения различных моделей предсказания целевых переменных, обучить модели и обоснованно выбрать наилучшие из них.</text:span></text:p>
      <text:p text:style-name="P5"/>
      <text:h text:style-name="P2" text:outline-level="2">Исследование и анализ <text:span text:style-name="T1">данных</text:span></text:h>
      <text:p text:style-name="P6"><text:span text:style-name="T1">В процессе исследования были выявлены пропуски в данных (всего 36): три строки данных с пропусками в 12-ти параметрах. Было принято решение, что эти строки подлежат удалению, поскольку занимают всего </text:span><text:span text:style-name="T2">0,3% датасета. </text:span></text:p>
      <text:p text:style-name="P7"><text:span text:style-name="T2">Так же было установлено, что данные сильно разбросаны за пределы </text:span>межквартильного размаха (IQR), <text:span text:style-name="T2">то есть характеризуются высокой дисперсией и наличием выбросов. </text:span></text:p>
      <table:table table:name="Таблица1" table:style-name="Таблица1">
        <table:table-column table:style-name="Таблица1.A"/>
        <table:table-row>
          <table:table-cell table:style-name="Таблица1.A1" office:value-type="string">
            <text:p text:style-name="P8">Топ-<text:span text:style-name="T2">5</text:span> признаков по количеству выбросов: </text:p>
            <text:p text:style-name="P8">VSA_EState10 247 </text:p>
            <text:p text:style-name="P8">VSA_EState9 243 </text:p>
            <text:p text:style-name="P8">fr_amide 243 </text:p>
            <text:p text:style-name="P8">fr_Al_OH 243 </text:p>
            <text:p text:style-name="P8">fr_aniline 222 </text:p>
            <text:p text:style-name="P9"><text:span text:style-name="T3">Общий процент аномальных значений в датасете: 4.79%</text:span> </text:p>
          </table:table-cell>
        </table:table-row>
      </table:table>
      <text:p text:style-name="P10"><text:span text:style-name="Source_20_Text"><text:span text:style-name="T4"/></text:span></text:p>
      <text:p text:style-name="P5">Проанализир<text:span text:style-name="T2">овав</text:span> данные, которые кажутся выбросами, <text:span text:style-name="T2">мы пришли к выводу что это естественное поведение подобных признаков в химических исследованиях, поэтому избавляться от данных нельзя, но следует провести нормализацию перед обучением моделей с использованием </text:span><text:span text:style-name="Source_20_Text">RobustScaler</text:span>, <text:soft-page-break/>поскольку он устойчив к выбросам и использует медиану и межквартильный размах.</text:p>
      <text:p text:style-name="P11">Для анализа целевых показателей <text:span text:style-name="T5">(IC50, CC50, SI) </text:span><text:span text:style-name="T6">были построены гистограммы их распределений, а так же гистограммы распределений их отрицательных логарифмов (см. рис. 1). Данные гистограмм наглядно показывают необходимость логарифмирования исходных показателей целевых переменных, поскольку исходное распределение похоже на логонормальное. На графиках видна очень сильная асимметрия, с длинным правым хвостом. А отрицательный логарифм по исходным данным дает нам распределение близкое к нормальному. </text:span></text:p>
      <text:p text:style-name="P12"/>
      <text:p text:style-name="P13"/>
      <text:p text:style-name="P13"><draw:frame draw:style-name="fr1" draw:name="Врезка1" text:anchor-type="char" svg:width="17cm" draw:z-index="0"><draw:text-box fo:min-height="15.93cm"><text:p text:style-name="Caption"><draw:frame draw:style-name="fr2" draw:name="Изображение1" text:anchor-type="paragraph" svg:width="17cm" style:rel-width="100%" svg:height="15.93cm" style:rel-height="scale" draw:z-index="1"><draw:image xlink:href="Pictures/1000000000000635000005D17201FE06.png" xlink:type="simple" xlink:show="embed" xlink:actuate="onLoad" draw:mime-type="image/png"/></draw:frame>Рис. 1. Распределение целевых переменных и их отрицательного логарифма</text:p></draw:text-box></draw:frame></text:p>
      <text:p text:style-name="P14"><text:soft-page-break/>Так же был проведен анализ наличия попарной корреляции Пирсона для каждой целевой переменной с имеющимися признаками. Анализ показал, что линейная зависимость отсутствует:</text:p>
      <text:p text:style-name="P14"/>
      <table:table table:name="Таблица2" table:style-name="Таблица2">
        <table:table-column table:style-name="Таблица2.A"/>
        <table:table-row>
          <table:table-cell table:style-name="Таблица2.A1" office:value-type="string">
            <text:p text:style-name="P15"><text:span text:style-name="Source_20_Text"><text:span text:style-name="T4">Топ-3 признака по Пирсону для IC50, mM:</text:span></text:span></text:p>
            <text:p text:style-name="P15"><text:span text:style-name="Source_20_Text"><text:span text:style-name="T4"><text:s text:c="2"/>VSA_EState4: r = -0.2717</text:span></text:span></text:p>
            <text:p text:style-name="P15"><text:span text:style-name="Source_20_Text"><text:span text:style-name="T4"><text:s text:c="2"/>Chi2n: r = -0.2527</text:span></text:span></text:p>
            <text:p text:style-name="P15"><text:span text:style-name="Source_20_Text"><text:span text:style-name="T4"><text:s text:c="2"/>PEOE_VSA7: r = -0.2508</text:span></text:span></text:p>
            <text:p text:style-name="P15"><text:span text:style-name="Source_20_Text"><text:span text:style-name="T4"/></text:span></text:p>
            <text:p text:style-name="P15"><text:span text:style-name="Source_20_Text"><text:span text:style-name="T4">Топ-3 признака по Пирсону для CC50, mM:</text:span></text:span></text:p>
            <text:p text:style-name="P15"><text:span text:style-name="Source_20_Text"><text:span text:style-name="T4"><text:s text:c="2"/>LabuteASA: r = -0.3078</text:span></text:span></text:p>
            <text:p text:style-name="P15"><text:span text:style-name="Source_20_Text"><text:span text:style-name="T4"><text:s text:c="2"/>MolMR: r = -0.3073</text:span></text:span></text:p>
            <text:p text:style-name="P15"><text:span text:style-name="Source_20_Text"><text:span text:style-name="T4"><text:s text:c="2"/>MolWt: r = -0.3049</text:span></text:span></text:p>
            <text:p text:style-name="P15"><text:span text:style-name="Source_20_Text"><text:span text:style-name="T4"/></text:span></text:p>
            <text:p text:style-name="P15"><text:span text:style-name="Source_20_Text"><text:span text:style-name="T4">Топ-3 признака по Пирсону для SI:</text:span></text:span></text:p>
            <text:p text:style-name="P15"><text:span text:style-name="Source_20_Text"><text:span text:style-name="T4"><text:s text:c="2"/>BalabanJ: r = 0.1647</text:span></text:span></text:p>
            <text:p text:style-name="P15"><text:span text:style-name="Source_20_Text"><text:span text:style-name="T4"><text:s text:c="2"/>fr_NH2: r = 0.1604</text:span></text:span></text:p>
            <text:p text:style-name="P15"><text:span text:style-name="Source_20_Text"><text:span text:style-name="T4"><text:s text:c="2"/>RingCount: r = -0.1248</text:span></text:span></text:p>
          </table:table-cell>
        </table:table-row>
      </table:table>
      <text:p text:style-name="P14"/>
      <text:p text:style-name="P16">Не смотря на отсутствие линейной корреляции признаков с целевыми переменными, было принято решение, для задач регрессии использовать модель множественной линейной регрессии с регуляризацией (<text:span text:style-name="Source_20_Text">Ridge Regression</text:span>) в качестве <text:span text:style-name="T5">baseline-</text:span><text:span text:style-name="T6">модели.</text:span></text:p>
      <text:p text:style-name="P17"><text:span text:style-name="T7">Для решения одной из задач, а именно «</text:span><text:span text:style-name="T4">Классификация: превышает ли значение SI значение 8</text:span><text:span text:style-name="T7">» была создана новая целевая переменная на базе исходной непрерывной </text:span><text:span text:style-name="T8">SI. </text:span><text:span text:style-name="T7">Был проведен анализ сбалансированности классов для данной задачи. Анализ показал, что 64% всех объектов относятся к нулевому классу, то есть выборка не сбалансирована. И было принято решение делить данные для обучения с параметром </text:span><text:span text:style-name="Source_20_Text"><text:span text:style-name="T7">stratify</text:span></text:span><text:span text:style-name="T7">, </text:span><text:span text:style-name="T9">для сохранения исходной структуры в обучающей и тестовой подвыборках.</text:span></text:p>
      <text:p text:style-name="P18"/>
      <text:h text:style-name="P2" text:outline-level="2">Предобработка данных и подбор наиболее значимых признаков для задач регрессии и классификации</text:h>
      <text:p text:style-name="P19">Все данные прошли предобработку и фильтрацию. Фильтрация признаков проходила в 2 этапа:</text:p>
      <text:list text:style-name="L1">
        <text:list-item>
          <text:p text:style-name="P20"><text:soft-page-break/>Отсечение константных признаков при помощи инструмента <text:span text:style-name="Source_20_Text">VarianceThreshold </text:span>от <text:span text:style-name="Source_20_Text">sklearn</text:span> с порогом чувствительности 0.01.</text:p>
        </text:list-item>
        <text:list-item>
          <text:p text:style-name="P21">После стандартизации было произведено выявление попарно скоррелированных признаков (коэффициент корреляции &gt; 0.9), которое выявило 46 пар признаков. Из каждой пары было оставлен один признак. </text:p>
        </text:list-item>
      </text:list>
      <text:p text:style-name="P22"/>
      <text:p text:style-name="P22">Фильтрация сократила количество признаков <text:span text:style-name="T5">c 210 </text:span>до <text:span text:style-name="T5">129.</text:span></text:p>
      <text:p text:style-name="P23">Для подбора наиболее значимых факторов для задач регрессии и классификации целевых переменных по медиане, была выбрана модель <text:span text:style-name="Source_20_Text">RandomForestRegressor</text:span> от <text:span text:style-name="Source_20_Text">sklearn</text:span>. Для задачи классификации <text:span text:style-name="T5">SI </text:span>по значению большему 8, применялся <text:span text:style-name="Source_20_Text">RandomForestClassifier</text:span>. Было выбрано по 30 наиболее важных признаков для каждой целевой переменной. Все подготовленные данные были сохранены в отдельные наборы файлов (обучающие и тестовые выборки сохранялись отдельно).</text:p>
      <text:p text:style-name="P23"/>
      <text:h text:style-name="P2" text:outline-level="2">Обучение моделей регрессии.</text:h>
      <text:p text:style-name="P24"><text:span text:style-name="T10">Для каждой целевой переменной было обучено </text:span><text:span text:style-name="T11">по </text:span><text:span text:style-name="T10">4 раз</text:span><text:span text:style-name="T11">лич</text:span><text:span text:style-name="T10">ных </text:span><text:span text:style-name="T11">архитектуры</text:span><text:span text:style-name="T10">, с подбором гиперпараметров.</text:span><text:span text:style-name="T12"> </text:span><text:span text:style-name="T13">В</text:span><text:span text:style-name="T14">се</text:span><text:span text:style-name="T14"> </text:span><text:span text:style-name="T15">модели, обученные в рамках данной работы, не подходят для вывода </text:span>в промышленную эксплуатацию<text:span text:style-name="T15">, поскольку обучены на 80% подвыборках, и не дополнены пайплайном по предобработке данных. Подходят только для предсказаний на готовых тестовых данных из соответствующих файлов работы "\data\processed\&lt;</text:span><text:span text:style-name="T13">target</text:span><text:span text:style-name="T15">&gt;_test.csv".</text:span></text:p>
      <text:h text:style-name="P25" text:outline-level="3">Результаты подбора параметров для модели регрессии <text:span text:style-name="T5">IC50</text:span></text:h>
      <text:p text:style-name="P26">Для задачи прогнозирования полумаксимального ингибирующего концентрирования (IC50) было проведено сравнительное тестирование четырех алгоритмов машинного обучения. </text:p>
      <text:p text:style-name="P27">Метрики качества обученных моделей для его предсказания представлены ниже:</text:p>
      <table:table table:name="Таблица3" table:style-name="Таблица3">
        <table:table-column table:style-name="Таблица3.A"/>
        <table:table-row>
          <table:table-cell table:style-name="Таблица3.A1" office:value-type="string">
            <text:p text:style-name="P28"><text:span text:style-name="Source_20_Text"><text:s text:c="2"/>М</text:span><text:span text:style-name="Source_20_Text"><text:span text:style-name="T10">­</text:span></text:span><text:span text:style-name="Source_20_Text">одель: RidgeRegression</text:span></text:p>
            <text:p text:style-name="P28"><text:span text:style-name="Source_20_Text">==================================================</text:span></text:p>
            <text:p text:style-name="P28"><text:span text:style-name="Source_20_Text"><text:s text:c="4"/>Лучшие параметры: {'alpha': np.float64(32.3</text:span><text:span text:style-name="Source_20_Text"><text:span text:style-name="T5">3623262496523</text:span></text:span><text:span text:style-name="Source_20_Text">)}</text:span></text:p>
            <text:p text:style-name="P28"><text:span text:style-name="Source_20_Text"><text:s text:c="4"/>Тестовый R²: 0.2384</text:span></text:p>
            <text:p text:style-name="P28"><text:span text:style-name="Source_20_Text"><text:s text:c="4"/>Тестовый MAE: 245.7523</text:span></text:p>
            <text:p text:style-name="P28"><text:span text:style-name="Source_20_Text"/></text:p>
            <text:p text:style-name="P28"><text:span text:style-name="Source_20_Text"><text:s text:c="2"/>Модель: GradientBoosting</text:span></text:p>
            <text:p text:style-name="P28"><text:span text:style-name="Source_20_Text">==================================================</text:span></text:p>
            <text:p text:style-name="P28"><text:span text:style-name="Source_20_Text"><text:s text:c="4"/>Лучшие параметры: {'subsample': 0.7, 'n_estimators': 150, </text:span><text:soft-page-break/><text:span text:style-name="Source_20_Text">'min_samples_leaf': 3, 'max_depth': 5, 'learning_rate': 0.05}</text:span></text:p>
            <text:p text:style-name="P28"><text:span text:style-name="Source_20_Text"><text:s text:c="4"/>Тестовый R²: 0.5514</text:span></text:p>
            <text:p text:style-name="P28"><text:span text:style-name="Source_20_Text"><text:s text:c="4"/>Тестовый MAE: 195.4543</text:span></text:p>
            <text:p text:style-name="P28"><text:span text:style-name="Source_20_Text"/></text:p>
            <text:p text:style-name="P28"><text:span text:style-name="Source_20_Text"><text:s text:c="2"/>Модель: CatBoost</text:span></text:p>
            <text:p text:style-name="P28"><text:span text:style-name="Source_20_Text">==================================================</text:span></text:p>
            <text:p text:style-name="P28"><text:span text:style-name="Source_20_Text"><text:s text:c="4"/>Лучшие параметры: {'max_leaves': 50, 'learning_rate': np.float64(0.05623413251903491), 'l2_leaf_reg': 3, 'iterations': 150, 'depth': 5}</text:span></text:p>
            <text:p text:style-name="P28"><text:span text:style-name="Source_20_Text"><text:s text:c="4"/>Тестовый R²: 0.5351</text:span></text:p>
            <text:p text:style-name="P28"><text:span text:style-name="Source_20_Text"><text:s text:c="4"/>Тестовый MAE: 206.3830</text:span></text:p>
            <text:p text:style-name="P28"><text:span text:style-name="Source_20_Text"/></text:p>
            <text:p text:style-name="P28"><text:span text:style-name="Source_20_Text"><text:s text:c="2"/>Модель: SVR</text:span></text:p>
            <text:p text:style-name="P28"><text:span text:style-name="Source_20_Text">==================================================</text:span></text:p>
            <text:p text:style-name="P28"><text:span text:style-name="Source_20_Text"><text:s text:c="4"/>Лучшие параметры: {'gamma': np.float64(0.023357214690901212), 'epsilon': 0.2, 'C': np.float64(4.281332398719392)}</text:span></text:p>
            <text:p text:style-name="P28"><text:span text:style-name="Source_20_Text"><text:s text:c="4"/>Тестовый R²: 0.5080</text:span></text:p>
            <text:p text:style-name="P28"><text:span text:style-name="Source_20_Text"><text:s text:c="4"/>Тестовый MAE: 201.3645</text:span></text:p>
          </table:table-cell>
        </table:table-row>
      </table:table>
      <text:p text:style-name="P29"/>
      <text:p text:style-name="P30"><text:span text:style-name="Source_20_Text"><text:span text:style-name="T16">Гребневая регрессия демонстрирует самые слабые результаты </text:span></text:span><text:span text:style-name="Source_20_Text"><text:span text:style-name="T17">(</text:span></text:span><text:span text:style-name="Source_20_Text"><text:span text:style-name="T9">R²</text:span></text:span><text:span text:style-name="Source_20_Text"><text:span text:style-name="T18">=0.2384</text:span></text:span><text:span text:style-name="Source_20_Text"><text:span text:style-name="T9"> </text:span></text:span><text:span text:style-name="Source_20_Text"><text:span text:style-name="T17">и </text:span></text:span><text:span text:style-name="Source_20_Text"><text:span text:style-name="T19">MAE</text:span></text:span><text:span text:style-name="Source_20_Text"><text:span text:style-name="T17">=</text:span></text:span><text:span text:style-name="Source_20_Text"><text:span text:style-name="T18">245.7523</text:span></text:span><text:span text:style-name="Source_20_Text"><text:span text:style-name="T17">).</text:span></text:span><text:span text:style-name="Source_20_Text"><text:span text:style-name="T20"> </text:span></text:span><text:span text:style-name="Source_20_Text"><text:span text:style-name="T17">Ее метрики говорят нам, что она не может объяснить 76% дисперсии в данных, и имеет максимальную ошибку предсказания по сравнению с остальными моделями.</text:span></text:span><text:span text:style-name="Source_20_Text"><text:span text:style-name="T20"> </text:span></text:span></text:p>
      <text:p text:style-name="P30"><text:span text:style-name="T9">Лучшей по </text:span><text:span text:style-name="T18">обеим метрикам (</text:span><text:span text:style-name="Source_20_Text"><text:span text:style-name="T9">R²</text:span></text:span><text:span text:style-name="Source_20_Text"><text:span text:style-name="T18">=</text:span></text:span><text:span text:style-name="Source_20_Text"><text:span text:style-name="T9">0.5514 </text:span></text:span><text:span text:style-name="T18">и </text:span><text:span text:style-name="T21">MAE</text:span><text:span text:style-name="T18">=</text:span><text:span text:style-name="Source_20_Text"><text:span text:style-name="T18">195.4543</text:span></text:span><text:span text:style-name="T18">)</text:span><text:span text:style-name="T21"> </text:span><text:span text:style-name="T18">б</text:span><text:span text:style-name="T9">ыла признана модель GradientBoosting. </text:span><text:span text:style-name="T18">Эта архитектура объясняет 55% разброса данных и максимально (среди обученных вариантов) приблизилась в своих предсказаниях к целевой переменной.</text:span><text:span text:style-name="T9"> Модель была <text:s/>сериализована и сохранена в файл. </text:span></text:p>
      <text:h text:style-name="P31" text:outline-level="3"/>
      <text:h text:style-name="P31" text:outline-level="3">Результаты подбора параметров для модели регрессии <text:span text:style-name="T13">C</text:span><text:span text:style-name="T5">C50</text:span></text:h>
      <text:p text:style-name="P32">В ходе исследования было проведено сравнительное тестирование четырех различных архитектур машинного обучения для задачи регрессионного прогнозирования биологической активности/токсичности. </text:p>
      <text:p text:style-name="P27">Метрики качества обученных моделей для его предсказания представлены ниже:</text:p>
      <table:table table:name="Таблица4" table:style-name="Таблица4">
        <table:table-column table:style-name="Таблица4.A"/>
        <table:table-row>
          <table:table-cell table:style-name="Таблица4.A1" office:value-type="string">
            <text:p text:style-name="P33"><text:span text:style-name="Source_20_Text"><text:s text:c="2"/>Модель: RidgeRegression</text:span></text:p>
            <text:p text:style-name="P33"><text:span text:style-name="Source_20_Text">==================================================</text:span></text:p>
            <text:p text:style-name="P33"><text:span text:style-name="Source_20_Text"><text:s text:c="4"/>Лучшие параметры: {'alpha': np.float64(615.4047449570229)}</text:span></text:p>
            <text:p text:style-name="P33"><text:span text:style-name="Source_20_Text"><text:s text:c="4"/>Тестовый R²: 0.1775</text:span></text:p>
            <text:p text:style-name="P33"><text:soft-page-break/><text:span text:style-name="Source_20_Text"><text:s text:c="4"/>Тестовый MAE: 469.1500</text:span></text:p>
            <text:p text:style-name="P33"><text:span text:style-name="Source_20_Text"/></text:p>
            <text:p text:style-name="P33"><text:span text:style-name="Source_20_Text"><text:s text:c="2"/>Модель: RandomForest</text:span></text:p>
            <text:p text:style-name="P33"><text:span text:style-name="Source_20_Text">==================================================</text:span></text:p>
            <text:p text:style-name="P33"><text:span text:style-name="Source_20_Text"><text:s text:c="4"/>Лучшие параметры: {'n_estimators': 200, 'min_samples_split': 2, 'min_samples_leaf': 1, 'max_depth': 12}</text:span></text:p>
            <text:p text:style-name="P33"><text:span text:style-name="Source_20_Text"><text:s text:c="4"/>Тестовый R²: 0.3733</text:span></text:p>
            <text:p text:style-name="P33"><text:span text:style-name="Source_20_Text"><text:s text:c="4"/>Тестовый MAE: 327.6602</text:span></text:p>
            <text:p text:style-name="P33"><text:span text:style-name="Source_20_Text"/></text:p>
            <text:p text:style-name="P33"><text:span text:style-name="Source_20_Text"><text:s text:c="2"/>Модель: CatBoost</text:span></text:p>
            <text:p text:style-name="P33"><text:span text:style-name="Source_20_Text">==================================================</text:span></text:p>
            <text:p text:style-name="P33"><text:span text:style-name="Source_20_Text"><text:s text:c="4"/>Лучшие параметры: {'max_leaves': 30, 'learning_rate': np.float64(0.01778279410038923), 'l2_leaf_reg': 3, 'iterations': 500, 'depth': 5}</text:span></text:p>
            <text:p text:style-name="P33"><text:span text:style-name="Source_20_Text"><text:s text:c="4"/>Тестовый R²: 0.3597</text:span></text:p>
            <text:p text:style-name="P33"><text:span text:style-name="Source_20_Text"><text:s text:c="4"/>Тестовый MAE: 332.3935</text:span></text:p>
            <text:p text:style-name="P33"><text:span text:style-name="Source_20_Text"/></text:p>
            <text:p text:style-name="P33"><text:span text:style-name="Source_20_Text"><text:s text:c="2"/>Модель: SVR</text:span></text:p>
            <text:p text:style-name="P33"><text:span text:style-name="Source_20_Text">==================================================</text:span></text:p>
            <text:p text:style-name="P33"><text:span text:style-name="Source_20_Text"><text:s text:c="4"/>Лучшие параметры: {'gamma': np.float64(0.023357214690901212), 'epsilon': 0.2, 'C': np.float64(4.281332398719392)}</text:span></text:p>
            <text:p text:style-name="P33"><text:span text:style-name="Source_20_Text"><text:s text:c="4"/>Тестовый R²: 0.4235</text:span></text:p>
            <text:p text:style-name="P33"><text:span text:style-name="Source_20_Text"><text:s text:c="4"/>Тестовый MAE: 355.6426</text:span></text:p>
          </table:table-cell>
        </table:table-row>
      </table:table>
      <text:p text:style-name="P34"/>
      <text:p text:style-name="P35"><text:span text:style-name="Source_20_Text"><text:span text:style-name="T4">RidgeRegression</text:span></text:span><text:span text:style-name="Source_20_Text"><text:span text:style-name="T22"> </text:span></text:span><text:span text:style-name="Source_20_Text"><text:span text:style-name="T23">п</text:span></text:span><text:span text:style-name="Source_20_Text"><text:span text:style-name="T24">оказал </text:span></text:span><text:span text:style-name="Source_20_Text"><text:span text:style-name="T16">ожидаемо низкий результат метрики, поскольку </text:span></text:span><text:span text:style-name="Source_20_Text"><text:span text:style-name="T25">в данных присутствует высокая мультиколинеарность, о чем свидетельствует и высокий оптимальный уровень регуляризации, выбранный при подборе параметров (</text:span></text:span><text:span text:style-name="Source_20_Text"><text:span text:style-name="T26">alpha ≈ 615</text:span></text:span><text:span text:style-name="Source_20_Text"><text:span text:style-name="T25">), при этом линейной попарной зависимости целевой переменной от признаков нет</text:span></text:span><text:span text:style-name="Source_20_Text"><text:span text:style-name="T16">. </text:span></text:span></text:p>
      <text:p text:style-name="P35"><text:span text:style-name="Source_20_Text"><text:span text:style-name="T27">RandomForest </text:span></text:span><text:span text:style-name="Source_20_Text"><text:span text:style-name="T25">и </text:span></text:span><text:span text:style-name="Source_20_Text"><text:span text:style-name="T27">CatBoost </text:span></text:span><text:span text:style-name="Source_20_Text"><text:span text:style-name="T25">основанные на деревьях решений, показали лучший результат, нежели линейная модель. </text:span></text:span></text:p>
      <text:p text:style-name="P35"><text:span text:style-name="T4">Лучшей по метрике </text:span><text:span text:style-name="Source_20_Text"><text:span text:style-name="T4">R²(0.4235) </text:span></text:span><text:span text:style-name="T4">была признана модель </text:span><text:span text:style-name="T28">SVR.</text:span><text:span text:style-name="T26"> </text:span><text:span text:style-name="T29">Э</text:span><text:span text:style-name="T26">та модель объясняет 42% дисперсии целевой переменной, </text:span><text:span text:style-name="T29">а значит совершает меньше ошибок на аномальных данных</text:span><text:span text:style-name="T4">. </text:span><text:span text:style-name="T30">При этом </text:span><text:span text:style-name="T31">с</text:span><text:span text:style-name="Source_20_Text"><text:span text:style-name="T25">амый низкий </text:span></text:span><text:span text:style-name="Source_20_Text"><text:span text:style-name="T27">MAE </text:span></text:span><text:span text:style-name="Source_20_Text"><text:span text:style-name="T25">оказался у </text:span></text:span><text:span text:style-name="Source_20_Text"><text:span text:style-name="T27">RandomForest </text:span></text:span><text:span text:style-name="Source_20_Text"><text:span text:style-name="T32">(</text:span></text:span><text:span text:style-name="Source_20_Text"><text:span text:style-name="T29">327.6602</text:span></text:span><text:span text:style-name="Source_20_Text"><text:span text:style-name="T32">)</text:span></text:span><text:span text:style-name="Source_20_Text"><text:span text:style-name="T27">,</text:span></text:span><text:span text:style-name="Source_20_Text"><text:span text:style-name="T25"> что говорит о том, что в среднем значения</text:span></text:span><text:span text:style-name="Source_20_Text"><text:span text:style-name="T27"> IC50, </text:span></text:span><text:span text:style-name="Source_20_Text"><text:span text:style-name="T25">предсказанные моделью случайного леса лежат ближе всего к исходной целевой переменной.</text:span></text:span></text:p>
      <text:p text:style-name="P36"><text:soft-page-break/><text:span text:style-name="T29">Для сохранения </text:span><text:span text:style-name="T4">была </text:span><text:span text:style-name="T31">выбрана модель нелинейного метода опорных векторов</text:span><text:span text:style-name="T33"> (SVR)</text:span><text:span text:style-name="T29">. Модель</text:span><text:span text:style-name="T34"> </text:span><text:span text:style-name="T4">сериализована и сохранена в файл /</text:span><text:span text:style-name="T33">models/model_cc50_regression.pkl.</text:span></text:p>
      <text:h text:style-name="P31" text:outline-level="3"/>
      <text:h text:style-name="P31" text:outline-level="3">Результаты подбора параметров для модели регрессии <text:span text:style-name="T13">SI</text:span></text:h>
      <text:p text:style-name="P37"><text:span text:style-name="T35">Индекс селективности (SI) является ключевым комплексным показателем </text:span>, определяющим терапевтическое окно соединения. </text:p>
      <text:p text:style-name="P27">Метрики качества обученных моделей для его предсказания представлены ниже:</text:p>
      <table:table table:name="Таблица5" table:style-name="Таблица5">
        <table:table-column table:style-name="Таблица5.A"/>
        <table:table-row>
          <table:table-cell table:style-name="Таблица5.A1" office:value-type="string">
            <text:p text:style-name="P33"><text:span text:style-name="Source_20_Text"><text:s text:c="2"/>Модель: RidgeRegression</text:span></text:p>
            <text:p text:style-name="P33"><text:span text:style-name="Source_20_Text">==================================================</text:span></text:p>
            <text:p text:style-name="P33"><text:span text:style-name="Source_20_Text"><text:s text:c="4"/>Лучшие параметры: {'alpha': np.float64(6.397620627963631)}</text:span></text:p>
            <text:p text:style-name="P33"><text:span text:style-name="Source_20_Text"><text:s text:c="4"/>Тестовый R²: 0.0346</text:span></text:p>
            <text:p text:style-name="P33"><text:span text:style-name="Source_20_Text"><text:s text:c="4"/>Тестовый MAE: 188.1860</text:span></text:p>
            <text:p text:style-name="P33"><text:span text:style-name="Source_20_Text"/></text:p>
            <text:p text:style-name="P33"><text:span text:style-name="Source_20_Text"><text:s text:c="2"/>Модель: RandomForest</text:span></text:p>
            <text:p text:style-name="P33"><text:span text:style-name="Source_20_Text">==================================================</text:span></text:p>
            <text:p text:style-name="P33"><text:span text:style-name="Source_20_Text"><text:s text:c="4"/>Лучшие параметры: {'n_estimators': 200, 'min_samples_split': 2, 'min_samples_leaf': 1, 'max_depth': 8}</text:span></text:p>
            <text:p text:style-name="P33"><text:span text:style-name="Source_20_Text"><text:s text:c="4"/>Тестовый R²: 0.2990</text:span></text:p>
            <text:p text:style-name="P33"><text:span text:style-name="Source_20_Text"><text:s text:c="4"/>Тестовый MAE: 183.8280</text:span></text:p>
            <text:p text:style-name="P33"><text:span text:style-name="Source_20_Text"/></text:p>
            <text:p text:style-name="P33"><text:span text:style-name="Source_20_Text"><text:s text:c="2"/>Модель: GradientBoosting</text:span></text:p>
            <text:p text:style-name="P33"><text:span text:style-name="Source_20_Text">==================================================</text:span></text:p>
            <text:p text:style-name="P33"><text:span text:style-name="Source_20_Text"><text:s text:c="4"/>Лучшие параметры: {'subsample': 0.7, 'n_estimators': 150, 'min_samples_leaf': 3, 'max_depth': 5, 'learning_rate': 0.01}</text:span></text:p>
            <text:p text:style-name="P33"><text:span text:style-name="Source_20_Text"><text:s text:c="4"/>Тестовый R²: 0.2655</text:span></text:p>
            <text:p text:style-name="P33"><text:span text:style-name="Source_20_Text"><text:s text:c="4"/>Тестовый MAE: 184.3417</text:span></text:p>
            <text:p text:style-name="P33"><text:span text:style-name="Source_20_Text"/></text:p>
            <text:p text:style-name="P33"><text:span text:style-name="Source_20_Text"><text:s text:c="2"/>Модель: CatBoost</text:span></text:p>
            <text:p text:style-name="P33"><text:span text:style-name="Source_20_Text">==================================================</text:span></text:p>
            <text:p text:style-name="P33"><text:span text:style-name="Source_20_Text"><text:s text:c="4"/>Лучшие параметры: {'max_leaves': 30, 'learning_rate': np.float64(0.01778279410038923), 'l2_leaf_reg': 3, 'iterations': 500, 'depth': 5}</text:span></text:p>
            <text:p text:style-name="P33"><text:span text:style-name="Source_20_Text"><text:s text:c="4"/>Тестовый R²: 0.2799</text:span></text:p>
            <text:p text:style-name="P33"><text:span text:style-name="Source_20_Text"><text:s text:c="4"/>Тестовый MAE: 183.5929</text:span></text:p>
          </table:table-cell>
        </table:table-row>
      </table:table>
      <text:p text:style-name="P34"/>
      <text:p text:style-name="P38"><text:soft-page-break/><text:span text:style-name="T36">Все модели показали низкие значения метрик </text:span><text:span text:style-name="Source_20_Text"><text:span text:style-name="T9">R²</text:span></text:span><text:span text:style-name="T36"> по сравнению с моделями предсказывающими </text:span><text:span text:style-name="T37">IC50 </text:span><text:span text:style-name="T36">и </text:span><text:span text:style-name="T37">CC50. </text:span><text:span text:style-name="T36">Дело в том, что </text:span><text:span text:style-name="T37">SI </text:span><text:span text:style-name="T36">это расчетный показатель, который получается путем деления </text:span><text:span text:style-name="T37">CC50/IC50 и </text:span><text:span text:style-name="T38">его зависимость от исходных данных накапливает ошбку предсказаний обеих компонент этой дроби. Хуже всего снова отработал алгоритм </text:span><text:span text:style-name="Source_20_Text"><text:span text:style-name="T38">RidgeRegression</text:span></text:span><text:span text:style-name="T38">. Хотя по </text:span><text:span text:style-name="T39">MAE </text:span><text:span text:style-name="T38">он близок к остальным моделям. </text:span></text:p>
      <text:p text:style-name="P39"><text:span text:style-name="T4">Лучшей по метрике </text:span><text:span text:style-name="Source_20_Text"><text:span text:style-name="T4">R²(0.2990) </text:span></text:span><text:span text:style-name="T4">была признана модель </text:span><text:span text:style-name="Source_20_Text"><text:span text:style-name="T28">RandomForest</text:span></text:span><text:span text:style-name="T4">. </text:span><text:span text:style-name="T40">По</text:span><text:span text:style-name="T41"> MAE </text:span><text:span text:style-name="T42">она совсем немного уступает архитектуре </text:span><text:span text:style-name="Source_20_Text"><text:span text:style-name="T42">CatBoost.</text:span></text:span><text:span text:style-name="T5"> </text:span><text:span text:style-name="T4">Модель была <text:s/>сериализована и сохранена в файл </text:span><text:s/>/<text:span text:style-name="T43">models/model_</text:span><text:span text:style-name="T41">si</text:span><text:span text:style-name="T43">_regression.pkl.</text:span><text:span text:style-name="T4"> </text:span></text:p>
      <text:p text:style-name="P40"/>
      <text:h text:style-name="P41" text:outline-level="2">Обучение моделей <text:span text:style-name="T44">классификации</text:span>.</text:h>
      <text:p text:style-name="P42">Для задачи <text:span text:style-name="T45">классификации исходные данные целевых переменных были преобразованы в бинарные в соответствии с принципом: 0, если значение &lt;</text:span><text:span text:style-name="T46">=</text:span><text:span text:style-name="T45"> медианного (или &lt;</text:span><text:span text:style-name="T46">= </text:span><text:span text:style-name="T45">8 для четвертой задачи с </text:span><text:span text:style-name="T46">SI</text:span><text:span text:style-name="T45">) и 1, если значение</text:span><text:span text:style-name="T45">  &gt; медианы </text:span><text:span text:style-name="T45">(или &gt;</text:span><text:span text:style-name="T46"> </text:span><text:span text:style-name="T45">8 для четвертой задачи с </text:span><text:span text:style-name="T46">SI</text:span><text:span text:style-name="T45">).</text:span></text:p>
      <text:p text:style-name="P43"><text:span text:style-name="T10">Для каждой целевой переменной было обучено </text:span><text:span text:style-name="T11">по </text:span><text:span text:style-name="T44">3</text:span><text:span text:style-name="T10"> раз</text:span><text:span text:style-name="T11">лич</text:span><text:span text:style-name="T10">ных </text:span><text:span text:style-name="T44">классификатора</text:span><text:span text:style-name="T10">, с подбором гиперпараметров.</text:span><text:span text:style-name="T12"> </text:span><text:span text:style-name="T13">В</text:span><text:span text:style-name="T14">се </text:span><text:span text:style-name="T15">модели, обученные в рамках данной работы, не подходят для вывода </text:span>в промышленную эксплуатацию<text:span text:style-name="T15">, поскольку обучены на 80% подвыборках, и не дополнены пайплайном по предобработке данных. Подходят только для предсказаний на готовых тестовых данных из соответствующих файлов работы "\data\processed\&lt;</text:span><text:span text:style-name="T13">target</text:span><text:span text:style-name="T15">&gt;_test.csv".</text:span></text:p>
      <text:h text:style-name="P44" text:outline-level="3"/>
      <text:h text:style-name="P44" text:outline-level="3">Результаты подбора параметров для модели <text:span text:style-name="T46">классификации</text:span> <text:span text:style-name="T5">IC50 </text:span><text:span text:style-name="T45">по превышению медианного значения выборки</text:span></text:h>
      <text:p text:style-name="P45"><text:span text:style-name="T47">Метрики качества обученных моделей представлены ниже:</text:span></text:p>
      <table:table table:name="Таблица6" table:style-name="Таблица6">
        <table:table-column table:style-name="Таблица6.A"/>
        <table:table-row>
          <table:table-cell table:style-name="Таблица6.A1" office:value-type="string">
            <text:p text:style-name="P46"><text:span text:style-name="Source_20_Text"><text:s text:c="2"/>Модель: LogisticRegression</text:span></text:p>
            <text:p text:style-name="P46"><text:span text:style-name="Source_20_Text">==================================================</text:span></text:p>
            <text:p text:style-name="P46"><text:span text:style-name="Source_20_Text"><text:s text:c="4"/>Лучшие параметры: {'C': 0.1}</text:span></text:p>
            <text:p text:style-name="P46"><text:span text:style-name="Source_20_Text"><text:s text:c="4"/>Accuracy на тестовой выборке: 0.6400</text:span></text:p>
            <text:p text:style-name="P46"><text:span text:style-name="Source_20_Text"><text:s text:c="4"/>ROC-AUC на тестовой выборке: 0.6838</text:span></text:p>
            <text:p text:style-name="P46"><text:span text:style-name="Source_20_Text"/></text:p>
            <text:p text:style-name="P46"><text:span text:style-name="Source_20_Text"><text:s text:c="2"/>Модель: RandomForest</text:span></text:p>
            <text:p text:style-name="P46"><text:span text:style-name="Source_20_Text">==================================================</text:span></text:p>
            <text:p text:style-name="P46"><text:span text:style-name="Source_20_Text"><text:s text:c="4"/>Лучшие параметры: {'max_depth': 8, 'min_samples_leaf': 1, 'min_samples_split': 10, 'n_estimators': 200}</text:span></text:p>
            <text:p text:style-name="P46"><text:span text:style-name="Source_20_Text"><text:s text:c="4"/>Accuracy на тестовой выборке: 0.7250</text:span></text:p>
            <text:p text:style-name="P46"><text:span text:style-name="Source_20_Text"><text:s text:c="4"/>ROC-AUC на тестовой выборке: 0.7888</text:span></text:p>
            <text:p text:style-name="P46"><text:soft-page-break/><text:span text:style-name="Source_20_Text"/></text:p>
            <text:p text:style-name="P46"><text:span text:style-name="Source_20_Text"><text:s text:c="2"/>Модель: LightGBM</text:span></text:p>
            <text:p text:style-name="P46"><text:span text:style-name="Source_20_Text">==================================================</text:span></text:p>
            <text:p text:style-name="P46"><text:span text:style-name="Source_20_Text"><text:s text:c="4"/>Лучшие параметры: {'learning_rate': 0.01, 'n_estimators': 200}</text:span></text:p>
            <text:p text:style-name="P46"><text:span text:style-name="Source_20_Text"><text:s text:c="4"/>Accuracy на тестовой выборке: 0.6800</text:span></text:p>
            <text:p text:style-name="P46"><text:span text:style-name="Source_20_Text"><text:s text:c="4"/>ROC-AUC на тестовой выборке: 0.7544</text:span></text:p>
          </table:table-cell>
        </table:table-row>
      </table:table>
      <text:p text:style-name="P47"/>
      <text:p text:style-name="P48"><text:span text:style-name="Source_20_Text"><text:span text:style-name="T48">Метрика </text:span></text:span><text:span text:style-name="Source_20_Text"><text:span text:style-name="T49">ROC-AUC</text:span></text:span><text:span text:style-name="Source_20_Text"><text:span text:style-name="T50"> </text:span></text:span><text:span text:style-name="Source_20_Text"><text:span text:style-name="T48">показывает как хорошо модель способна разделить классы. Значение метрики в пределах 0.7-0.8 говорит о среднем, удовлетворительном качестве модели. В эту категорию вошли две модели (</text:span></text:span><text:span text:style-name="Source_20_Text"><text:span text:style-name="T49">RandomForest</text:span></text:span><text:span text:style-name="Source_20_Text"><text:span text:style-name="T48"> и </text:span></text:span><text:span text:style-name="Source_20_Text"><text:span text:style-name="T49">LightGBM</text:span></text:span><text:span text:style-name="Source_20_Text"><text:span text:style-name="T48">) из обученных. </text:span></text:span><text:span text:style-name="Source_20_Text"><text:span text:style-name="T49">LogisticRegression</text:span></text:span><text:span text:style-name="Source_20_Text"><text:span text:style-name="T48"> с </text:span></text:span><text:span text:style-name="Source_20_Text"><text:span text:style-name="T49">ROC-AUC=0.6838</text:span></text:span><text:span text:style-name="Source_20_Text"><text:span text:style-name="T48"> классифицируется как слабая. </text:span></text:span></text:p>
      <text:p text:style-name="P48"><text:span text:style-name="Source_20_Text"><text:span text:style-name="T48">По показателю точности (</text:span></text:span><text:span text:style-name="Source_20_Text"><text:span text:style-name="T49">Accuracy</text:span></text:span><text:span text:style-name="Source_20_Text"><text:span text:style-name="T48">) </text:span></text:span><text:span text:style-name="Source_20_Text"><text:span text:style-name="T49">LogisticRegression</text:span></text:span><text:span text:style-name="Source_20_Text"><text:span text:style-name="T48"> также показывает самый слабый результат.</text:span></text:span></text:p>
      <text:p text:style-name="P49"><text:span text:style-name="Source_20_Text"><text:span text:style-name="T48">Лучшей моделью по обеим метрикам признана </text:span></text:span><text:span text:style-name="Source_20_Text"><text:span text:style-name="T49">RandomForest</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53">i</text:span></text:span><text:span text:style-name="Source_20_Text"><text:span text:style-name="T54">c50</text:span></text:span><text:span text:style-name="Source_20_Text"><text:span text:style-name="T52">_</text:span></text:span><text:span text:style-name="Source_20_Text"><text:span text:style-name="T54">classif</text:span></text:span><text:span text:style-name="Source_20_Text"><text:span text:style-name="T54">ication</text:span></text:span><text:span text:style-name="Source_20_Text"><text:span text:style-name="T52">.pkl</text:span></text:span><text:span text:style-name="Source_20_Text"><text:span text:style-name="T52">.</text:span></text:span></text:p>
      <text:h text:style-name="P50" text:outline-level="3"/>
      <text:h text:style-name="P50" text:outline-level="3">Результаты подбора параметров для модели <text:span text:style-name="T46">классификации</text:span> <text:span text:style-name="T55">C</text:span><text:span text:style-name="T5">C50 </text:span><text:span text:style-name="T45">по превышению медианного значения выборки</text:span></text:h>
      <text:p text:style-name="P51"><text:span text:style-name="T56">Для данной задачи, модель </text:span><text:span text:style-name="Source_20_Text"><text:span text:style-name="T49">LogisticRegression</text:span></text:span><text:span text:style-name="T56"> была заменена на метод опорных векторов, так как логистическая регрессия</text:span><text:span text:style-name="T57"> c </text:span><text:span text:style-name="T56">алгоритмом оптимизации по-умолчанию</text:span><text:span text:style-name="T57"> </text:span><text:span text:style-name="T56">(</text:span><text:span text:style-name="Source_20_Text"><text:span text:style-name="T56">lbfgs)</text:span></text:span><text:span text:style-name="T56"> п</text:span><text:span text:style-name="T56">оказала отсутствие сходимости, а при изменении алгоритма на стохастический градиентный спуск </text:span><text:span text:style-name="T57">(</text:span><text:span text:style-name="Source_20_Text"><text:span text:style-name="T57">saga</text:span></text:span><text:span text:style-name="T57">) </text:span><text:span text:style-name="T56">показала неудовлетворительные метрики (</text:span><text:span text:style-name="Source_20_Text"><text:span text:style-name="T56">ROC-AUC </text:span></text:span><text:span text:style-name="T56">около 0.5). </text:span><text:span text:style-name="T58">Наиболее очевидная причина — мультиколлинеарность в данных.</text:span></text:p>
      <text:p text:style-name="P52">Метрики качества обученных моделей представлены ниже:</text:p>
      <table:table table:name="Таблица7" table:style-name="Таблица7">
        <table:table-column table:style-name="Таблица7.A"/>
        <table:table-row>
          <table:table-cell table:style-name="Таблица7.A1" office:value-type="string">
            <text:p text:style-name="P53"><text:span text:style-name="Source_20_Text"><text:s text:c="2"/>Модель: SVC</text:span></text:p>
            <text:p text:style-name="P53"><text:span text:style-name="Source_20_Text">==================================================</text:span></text:p>
            <text:p text:style-name="P53"><text:span text:style-name="Source_20_Text"><text:s text:c="4"/>Лучшие параметры: {'C': 1.0, 'gamma': 'auto'}</text:span></text:p>
            <text:p text:style-name="P53"><text:span text:style-name="Source_20_Text"><text:s text:c="4"/>Accuracy на тестовой выборке: 0.7200</text:span></text:p>
            <text:p text:style-name="P53"><text:span text:style-name="Source_20_Text"><text:s text:c="4"/>ROC-AUC на тестовой выборке: 0.7898</text:span></text:p>
            <text:p text:style-name="P53"><text:span text:style-name="Source_20_Text"/></text:p>
            <text:p text:style-name="P53"><text:span text:style-name="Source_20_Text"><text:s text:c="2"/>Модель: RandomForest</text:span></text:p>
            <text:p text:style-name="P53"><text:span text:style-name="Source_20_Text">==================================================</text:span></text:p>
            <text:p text:style-name="P53"><text:span text:style-name="Source_20_Text"><text:s text:c="4"/>Лучшие параметры: {'max_depth': 8, 'min_samples_leaf': 4, 'min_samples_split': 10, 'n_estimators': 100}</text:span></text:p>
            <text:p text:style-name="P53"><text:span text:style-name="Source_20_Text"><text:s text:c="4"/>Accuracy на тестовой выборке: 0.7650</text:span></text:p>
            <text:p text:style-name="P53"><text:soft-page-break/><text:span text:style-name="Source_20_Text"><text:s text:c="4"/>ROC-AUC на тестовой выборке: 0.8402</text:span></text:p>
            <text:p text:style-name="P53"><text:span text:style-name="Source_20_Text"/></text:p>
            <text:p text:style-name="P53"><text:span text:style-name="Source_20_Text"><text:s text:c="2"/>Модель: LightGBM</text:span></text:p>
            <text:p text:style-name="P53"><text:span text:style-name="Source_20_Text">==================================================</text:span></text:p>
            <text:p text:style-name="P53"><text:span text:style-name="Source_20_Text"><text:s text:c="4"/>Лучшие параметры: {'learning_rate': 0.01, 'n_estimators': 200}</text:span></text:p>
            <text:p text:style-name="P53"><text:span text:style-name="Source_20_Text"><text:s text:c="4"/>Accuracy на тестовой выборке: 0.7750</text:span></text:p>
            <text:p text:style-name="P53"><text:span text:style-name="Source_20_Text"><text:s text:c="4"/>ROC-AUC на тестовой выборке: 0.8418</text:span></text:p>
          </table:table-cell>
        </table:table-row>
      </table:table>
      <text:p text:style-name="P54"/>
      <text:p text:style-name="P51"><text:span text:style-name="Source_20_Text"><text:span text:style-name="T53">Модель </text:span></text:span><text:span text:style-name="Source_20_Text"><text:span text:style-name="T54">SVC </text:span></text:span><text:span text:style-name="Source_20_Text"><text:span text:style-name="T53">показывает удовлетворительное качество классификации по </text:span></text:span><text:span text:style-name="Source_20_Text"><text:span text:style-name="T56">ROC-AUC.</text:span></text:span><text:span text:style-name="Source_20_Text"><text:span text:style-name="T53"> А наилучшие результаты по обеим метрикам у </text:span></text:span><text:span text:style-name="Source_20_Text"><text:span text:style-name="T56">LightGBM. </text:span></text:span><text:span text:style-name="Source_20_Text"><text:span text:style-name="T53">Она показывает хорошее качество разделения классов, и обеспечивает наибольшую точность правильных предсказаний на тестовой выборке.</text:span></text:span></text:p>
      <text:p text:style-name="P49"><text:span text:style-name="Source_20_Text"><text:span text:style-name="T53">Модель</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59">c</text:span></text:span><text:span text:style-name="Source_20_Text"><text:span text:style-name="T54">c50</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55" text:outline-level="3"/>
      <text:h text:style-name="P55" text:outline-level="3">Результаты подбора параметров для модели <text:span text:style-name="T46">классификации</text:span><text:span text:style-name="T5"> </text:span><text:span text:style-name="T60">S</text:span><text:span text:style-name="T61">I</text:span><text:span text:style-name="T5"> </text:span><text:span text:style-name="T45">по превышению медианного значения выборки</text:span></text:h>
      <text:p text:style-name="P51"><text:span text:style-name="T56">Для данной задачи, модель </text:span><text:span text:style-name="Source_20_Text"><text:span text:style-name="T49">LogisticRegression</text:span></text:span><text:span text:style-name="T57"> </text:span><text:span text:style-name="T58">также </text:span><text:span text:style-name="T56">была заменена на метод опорных векторов </text:span><text:span text:style-name="T58">(</text:span><text:span text:style-name="T62">SVC</text:span><text:span text:style-name="T58">)</text:span><text:span text:style-name="T56">, так как логистическая регрессия</text:span><text:span text:style-name="T57"> c </text:span><text:span text:style-name="T56">алгоритмом оптимизации по-умолчанию</text:span><text:span text:style-name="T57"> </text:span><text:span text:style-name="T56">(</text:span><text:span text:style-name="Source_20_Text"><text:span text:style-name="T56">lbfgs)</text:span></text:span><text:span text:style-name="T56"> показала отсутствие сходимости, а при изменении алгоритма на стохастический градиентный спуск </text:span><text:span text:style-name="T57">(</text:span><text:span text:style-name="Source_20_Text"><text:span text:style-name="T57">saga</text:span></text:span><text:span text:style-name="T57">) </text:span><text:span text:style-name="T56">показала неудовлетворительные метрики. </text:span><text:span text:style-name="T58">Наиболее очевидная причина — мультиколлинеарность в данных.</text:span></text:p>
      <text:p text:style-name="P56">Метрики качества обученных моделей представлены ниже:</text:p>
      <table:table table:name="Таблица8" table:style-name="Таблица8">
        <table:table-column table:style-name="Таблица8.A"/>
        <table:table-row>
          <table:table-cell table:style-name="Таблица8.A1" office:value-type="string">
            <text:p text:style-name="P57"><text:span text:style-name="Source_20_Text"><text:s text:c="2"/>Модель: SVC</text:span></text:p>
            <text:p text:style-name="P57"><text:span text:style-name="Source_20_Text">==================================================</text:span></text:p>
            <text:p text:style-name="P57"><text:span text:style-name="Source_20_Text"><text:s text:c="4"/>Лучшие параметры: {'C': 10.0, 'gamma': 'auto'}</text:span></text:p>
            <text:p text:style-name="P57"><text:span text:style-name="Source_20_Text"><text:s text:c="4"/>Accuracy на тестовой выборке: 0.6650</text:span></text:p>
            <text:p text:style-name="P57"><text:span text:style-name="Source_20_Text"><text:s text:c="4"/>ROC-AUC на тестовой выборке: 0.7018</text:span></text:p>
            <text:p text:style-name="P57"><text:span text:style-name="Source_20_Text"/></text:p>
            <text:p text:style-name="P57"><text:span text:style-name="Source_20_Text"><text:s text:c="2"/>Модель: RandomForest</text:span></text:p>
            <text:p text:style-name="P57"><text:span text:style-name="Source_20_Text">==================================================</text:span></text:p>
            <text:p text:style-name="P57"><text:span text:style-name="Source_20_Text"><text:s text:c="4"/>Лучшие параметры: {'max_depth': 8, 'min_samples_leaf': 1, 'min_samples_split': 10, 'n_estimators': 100}</text:span></text:p>
            <text:p text:style-name="P57"><text:span text:style-name="Source_20_Text"><text:s text:c="4"/>Accuracy на тестовой выборке: 0.6600</text:span></text:p>
            <text:p text:style-name="P57"><text:span text:style-name="Source_20_Text"><text:s text:c="4"/>ROC-AUC на тестовой выборке: 0.7117</text:span></text:p>
            <text:p text:style-name="P57"><text:span text:style-name="Source_20_Text"/></text:p>
            <text:p text:style-name="P57"><text:soft-page-break/><text:span text:style-name="Source_20_Text"><text:s text:c="2"/>Модель: LightGBM</text:span></text:p>
            <text:p text:style-name="P57"><text:span text:style-name="Source_20_Text">==================================================</text:span></text:p>
            <text:p text:style-name="P57"><text:span text:style-name="Source_20_Text"><text:s text:c="4"/>Лучшие параметры: {'learning_rate': 0.01, 'n_estimators': 100}</text:span></text:p>
            <text:p text:style-name="P57"><text:span text:style-name="Source_20_Text"><text:s text:c="4"/>Accuracy на тестовой выборке: 0.6350</text:span></text:p>
            <text:p text:style-name="P57"><text:span text:style-name="Source_20_Text"><text:s text:c="4"/>ROC-AUC на тестовой выборке: 0.6861</text:span></text:p>
          </table:table-cell>
        </table:table-row>
      </table:table>
      <text:p text:style-name="P58"/>
      <text:p text:style-name="P59"><text:span text:style-name="Source_20_Text"><text:span text:style-name="T63">В задаче регрессии показателя </text:span></text:span><text:span text:style-name="Source_20_Text"><text:span text:style-name="T64">SI </text:span></text:span><text:span text:style-name="Source_20_Text"><text:span text:style-name="T63">уже была упомянута сложность его предсказания из-за природы данных. В задаче классификации это так же становится заметным. Наилучший результат показала модель</text:span></text:span><text:span text:style-name="Source_20_Text"><text:span text:style-name="T64"> </text:span></text:span><text:span text:style-name="Source_20_Text"><text:span text:style-name="T62">RandomForest</text:span></text:span><text:span text:style-name="Source_20_Text"><text:span text:style-name="T64"> </text:span></text:span><text:span text:style-name="Source_20_Text"><text:span text:style-name="T59">(</text:span></text:span><text:span text:style-name="Source_20_Text"><text:span text:style-name="T65">ROC-AUC=0.7117</text:span></text:span><text:span text:style-name="Source_20_Text"><text:span text:style-name="T59">)</text:span></text:span><text:span text:style-name="Source_20_Text"><text:span text:style-name="T64">,</text:span></text:span><text:span text:style-name="Source_20_Text"><text:span text:style-name="T63"> что считается удовлетворительным качеством предсказания. </text:span></text:span><text:span text:style-name="Source_20_Text"><text:span text:style-name="T58">SVC</text:span></text:span><text:span text:style-name="Source_20_Text"><text:span text:style-name="T63"> </text:span></text:span><text:span text:style-name="Source_20_Text"><text:span text:style-name="T59">близок к ней по метрикам. А вот самый слабый результат у </text:span></text:span><text:span text:style-name="Source_20_Text"><text:span text:style-name="T65">LightGBM.</text:span></text:span></text:p>
      <text:p text:style-name="P59"><text:span text:style-name="Source_20_Text"><text:span text:style-name="T53">Модель </text:span></text:span><text:span text:style-name="Source_20_Text"><text:span text:style-name="T62">RandomForest</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66">si</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60" text:outline-level="3"/>
      <text:h text:style-name="P60" text:outline-level="3">Результаты подбора параметров для модели <text:span text:style-name="T46">классификации</text:span><text:span text:style-name="T5"> </text:span><text:span text:style-name="T60">S</text:span><text:span text:style-name="T61">I</text:span><text:span text:style-name="T5"> </text:span><text:span text:style-name="T45">по превышению </text:span><text:span text:style-name="T67">значения 8</text:span></text:h>
      <text:p text:style-name="P61">Это задача предсказания, попадает ли препарат в так называемое терапевтическое окно, где оно достаточно безопасно и при этом эффективно.</text:p>
      <text:p text:style-name="P59"><text:span text:style-name="T68">Метрики качества обученных моделей представлены ниже:</text:span></text:p>
      <table:table table:name="Таблица9" table:style-name="Таблица9">
        <table:table-column table:style-name="Таблица9.A"/>
        <table:table-row>
          <table:table-cell table:style-name="Таблица9.A1" office:value-type="string">
            <text:p text:style-name="P62"><text:span text:style-name="Source_20_Text"/></text:p>
            <text:p text:style-name="P62"><text:span text:style-name="Source_20_Text"><text:s text:c="2"/>Модель: SVC</text:span></text:p>
            <text:p text:style-name="P62"><text:span text:style-name="Source_20_Text">==================================================</text:span></text:p>
            <text:p text:style-name="P62"><text:span text:style-name="Source_20_Text"><text:s text:c="4"/>Лучшие параметры: {'C': 10.0, 'gamma': 'auto'}</text:span></text:p>
            <text:p text:style-name="P62"><text:span text:style-name="Source_20_Text"><text:s text:c="4"/>F1 на тестовой выборке: 0.5672</text:span></text:p>
            <text:p text:style-name="P62"><text:span text:style-name="Source_20_Text"><text:s text:c="4"/>ROC-AUC на тестовой выборке: 0.7119</text:span></text:p>
            <text:p text:style-name="P62"><text:span text:style-name="Source_20_Text"/></text:p>
            <text:p text:style-name="P62"><text:span text:style-name="Source_20_Text"><text:s text:c="2"/>Модель: RandomForest</text:span></text:p>
            <text:p text:style-name="P62"><text:span text:style-name="Source_20_Text">==================================================</text:span></text:p>
            <text:p text:style-name="P62"><text:span text:style-name="Source_20_Text"><text:s text:c="4"/>Лучшие параметры: {'max_depth': 8, 'min_samples_leaf': 4, 'min_samples_split': 10, 'n_estimators': 100}</text:span></text:p>
            <text:p text:style-name="P62"><text:span text:style-name="Source_20_Text"><text:s text:c="4"/>F1 на тестовой выборке: 0.5546</text:span></text:p>
            <text:p text:style-name="P62"><text:span text:style-name="Source_20_Text"><text:s text:c="4"/>ROC-AUC на тестовой выборке: 0.7162</text:span></text:p>
            <text:p text:style-name="P62"><text:span text:style-name="Source_20_Text"/></text:p>
            <text:p text:style-name="P62"><text:span text:style-name="Source_20_Text"><text:s text:c="2"/>Модель: LightGBM</text:span></text:p>
            <text:p text:style-name="P62"><text:span text:style-name="Source_20_Text">==================================================</text:span></text:p>
            <text:p text:style-name="P62"><text:span text:style-name="Source_20_Text"><text:s text:c="4"/>Лучшие параметры: {'learning_rate': 0.01, 'n_estimators': 200}</text:span></text:p>
            <text:p text:style-name="P62"><text:soft-page-break/><text:span text:style-name="Source_20_Text"><text:s text:c="4"/>F1 на тестовой выборке: 0.5833</text:span></text:p>
            <text:p text:style-name="P62"><text:span text:style-name="Source_20_Text"><text:s text:c="4"/>ROC-AUC на тестовой выборке: 0.7214</text:span></text:p>
          </table:table-cell>
        </table:table-row>
      </table:table>
      <text:p text:style-name="P63"/>
      <text:p text:style-name="P64"><text:span text:style-name="Source_20_Text"><text:span text:style-name="T69">Поскольку данные асимметричны, метрика точность </text:span></text:span><text:span text:style-name="Source_20_Text"><text:span text:style-name="T70">Accuracy </text:span></text:span><text:span text:style-name="Source_20_Text"><text:span text:style-name="T69">была заменена на метрику </text:span></text:span><text:span text:style-name="Source_20_Text"><text:span text:style-name="T70">F1, которая позволяет оценить баланс между точностью (Precision) и полнотой (Recall) предсказания целевого (редкого) класса. <text:s/></text:span></text:span><text:span text:style-name="Source_20_Text"><text:span text:style-name="T69">Максимальное значение этой метрики имеет модель </text:span></text:span><text:span text:style-name="Source_20_Text"><text:span text:style-name="T71">LightGBM</text:span></text:span><text:span text:style-name="Source_20_Text"><text:span text:style-name="T69"> (</text:span></text:span><text:span text:style-name="Source_20_Text"><text:span text:style-name="T71">F1=0.5833</text:span></text:span><text:span text:style-name="Source_20_Text"><text:span text:style-name="T69">), и это не слишком высокий показатель, который говорит о большом количестве ложноположительных </text:span></text:span><text:span text:style-name="Source_20_Text"><text:span text:style-name="T72">и ложноотрицательных</text:span></text:span><text:span text:style-name="Source_20_Text"><text:span text:style-name="T69"> срабатываний у всех моделей. </text:span></text:span></text:p>
      <text:p text:style-name="P65"><text:span text:style-name="Source_20_Text"><text:span text:style-name="T59">Все три архитектуры показали очень близкий удовлетворительный результат классификации </text:span></text:span><text:span text:style-name="Source_20_Text"><text:span text:style-name="T69">по метрике </text:span></text:span><text:span text:style-name="Source_20_Text"><text:span text:style-name="T71">ROC-AUC</text:span></text:span><text:span text:style-name="Source_20_Text"><text:span text:style-name="T59">. </text:span></text:span><text:span text:style-name="Source_20_Text"><text:span text:style-name="T69">Но лучшей по этому показателю так же оказался </text:span></text:span><text:span text:style-name="Source_20_Text"><text:span text:style-name="T71">LightGBM.</text:span></text:span></text:p>
      <text:p text:style-name="P65"><text:span text:style-name="Source_20_Text"><text:span text:style-name="T53">Модель </text:span></text:span><text:span text:style-name="Source_20_Text"><text:span text:style-name="T71">LightGBM</text:span></text:span><text:span text:style-name="Source_20_Text"><text:span text:style-name="T48"> сериализована и сохранения в файл <text:s/></text:span></text:span><text:span text:style-name="Source_20_Text"><text:span text:style-name="T51">/</text:span></text:span><text:span text:style-name="Source_20_Text"><text:span text:style-name="T52">models/model_</text:span></text:span><text:span text:style-name="Source_20_Text"><text:span text:style-name="T66">si</text:span></text:span><text:span text:style-name="Source_20_Text"><text:span text:style-name="T52">_</text:span></text:span><text:span text:style-name="Source_20_Text"><text:span text:style-name="T54">classification</text:span></text:span><text:span text:style-name="Source_20_Text"><text:span text:style-name="T52">.pkl.</text:span></text:span></text:p>
      <text:h text:style-name="P2" text:outline-level="2"><text:span text:style-name="Source_20_Text"/></text:h>
      <text:h text:style-name="P2" text:outline-level="2"><text:span text:style-name="Source_20_Text">Рекомендации по улучшению построенных моделей</text:span></text:h>
      <text:p text:style-name="P66"><text:span text:style-name="Source_20_Text"><text:span text:style-name="T73">Для улучшения результатов предсказаний моделей регрессии и классификации, необходимо предоставить моделям больше данных для обучения. </text:span></text:span></text:p>
      <text:p text:style-name="P66"><text:span text:style-name="Source_20_Text"><text:span text:style-name="T73">Возможно, к увеличению метрик преведет борьба с мультиколлинеарностью, которая привела к низким показателям нескольких обученных моделей (</text:span></text:span><text:span text:style-name="Source_20_Text"><text:span text:style-name="T74">RidgeRegression, LogisticRegression</text:span></text:span><text:span text:style-name="Source_20_Text"><text:span text:style-name="T73">) и понижение размерности данных, например с использованием метода главных компонент (</text:span></text:span><text:span text:style-name="Source_20_Text"><text:span text:style-name="T74">PCA</text:span></text:span><text:span text:style-name="Source_20_Text"><text:span text:style-name="T73">). </text:span></text:span></text:p>
      <text:p text:style-name="P66"><text:span text:style-name="Source_20_Text"><text:span text:style-name="T73">Так же для решения данных задач рекомендуется протестировать использование глубоких нейросетей.</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17:26:45.563833500</meta:creation-date>
    <dc:date>2026-05-25T21:24:07.644299000</dc:date>
    <meta:editing-duration>PT1H21M33S</meta:editing-duration>
    <meta:editing-cycles>11</meta:editing-cycles>
    <meta:generator>LibreOffice/25.2.7.2$Windows_X86_64 LibreOffice_project/5cbfd1ab6520636bb5f7b99185aa69bd7456825d</meta:generator>
    <meta:print-date>2026-05-25T21:18:17.262522900</meta:print-date>
    <meta:printed-by>Файлы PDF</meta:printed-by>
    <meta:document-statistic meta:table-count="9" meta:image-count="1" meta:object-count="0" meta:page-count="12" meta:paragraph-count="207" meta:word-count="2021" meta:character-count="17563" meta:non-whitespace-character-count="15392"/>
  </office:meta>
</office:document-meta>
</file>